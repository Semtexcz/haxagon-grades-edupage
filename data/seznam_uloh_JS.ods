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1.966cm"/>
    </style:style>
    <style:style style:name="co4" style:family="table-column">
      <style:table-column-properties fo:break-before="auto" style:column-width="2.596cm"/>
    </style:style>
    <style:style style:name="co5" style:family="table-column">
      <style:table-column-properties fo:break-before="auto" style:column-width="4.748cm"/>
    </style:style>
    <style:style style:name="co6" style:family="table-column">
      <style:table-column-properties fo:break-before="auto" style:column-width="2.051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4.911cm"/>
    </style:style>
    <style:style style:name="co10" style:family="table-column">
      <style:table-column-properties fo:break-before="auto" style:column-width="4.5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49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eznam_uloh_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Max points</text:p>
          </table:table-cell>
          <table:table-cell office:value-type="string" calcext:value-type="string">
            <text:p>Points earned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Due time</text:p>
          </table:table-cell>
          <table:table-cell office:value-type="string" calcext:value-type="string">
            <text:p>Submission state</text:p>
          </table:table-cell>
          <table:table-cell office:value-type="string" calcext:value-type="string">
            <text:p>Submitted at</text:p>
          </table:table-cell>
          <table:table-cell office:value-type="string" calcext:value-type="string">
            <text:p>Updated at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Dotazník spokojenosti Kalibro</text:p>
          </table:table-cell>
          <table:table-cell table:number-columns-repeated="4"/>
          <table:table-cell table:style-name="ce1" office:value-type="date" office:date-value="2025-11-21" calcext:value-type="date">
            <text:p>2025-11-21</text:p>
          </table:table-cell>
          <table:table-cell table:style-name="ce2" office:value-type="string" calcext:value-type="string">
            <text:p>09:00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21T08:51:29.015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Dotazník spokojenosti Kalibro</text:p>
          </table:table-cell>
          <table:table-cell table:number-columns-repeated="4"/>
          <table:table-cell table:style-name="ce1" office:value-type="date" office:date-value="2025-11-21" calcext:value-type="date">
            <text:p>2025-11-21</text:p>
          </table:table-cell>
          <table:table-cell table:style-name="ce2" office:value-type="string" calcext:value-type="string">
            <text:p>09:00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21T10:41:34.697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Dotazník spokojenosti Kalibro</text:p>
          </table:table-cell>
          <table:table-cell table:number-columns-repeated="4"/>
          <table:table-cell table:style-name="ce1" office:value-type="date" office:date-value="2025-11-21" calcext:value-type="date">
            <text:p>2025-11-21</text:p>
          </table:table-cell>
          <table:table-cell table:style-name="ce2" office:value-type="string" calcext:value-type="string">
            <text:p>09:00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1-21T08:40:18.117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Dotazník spokojenosti Kalibro</text:p>
          </table:table-cell>
          <table:table-cell table:number-columns-repeated="4"/>
          <table:table-cell table:style-name="ce1" office:value-type="date" office:date-value="2025-11-21" calcext:value-type="date">
            <text:p>2025-11-21</text:p>
          </table:table-cell>
          <table:table-cell table:style-name="ce2" office:value-type="string" calcext:value-type="string">
            <text:p>09:00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21T08:48:32.535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Dotazník spokojenosti Kalibro</text:p>
          </table:table-cell>
          <table:table-cell table:number-columns-repeated="4"/>
          <table:table-cell table:style-name="ce1" office:value-type="date" office:date-value="2025-11-21" calcext:value-type="date">
            <text:p>2025-11-21</text:p>
          </table:table-cell>
          <table:table-cell table:style-name="ce2" office:value-type="string" calcext:value-type="string">
            <text:p>09:00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21T08:51:32.116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Dotazník spokojenosti Kalibro</text:p>
          </table:table-cell>
          <table:table-cell table:number-columns-repeated="4"/>
          <table:table-cell table:style-name="ce1" office:value-type="date" office:date-value="2025-11-21" calcext:value-type="date">
            <text:p>2025-11-21</text:p>
          </table:table-cell>
          <table:table-cell table:style-name="ce2" office:value-type="string" calcext:value-type="string">
            <text:p>09:00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21T08:46:41.821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Dotazník spokojenosti Kalibro</text:p>
          </table:table-cell>
          <table:table-cell table:number-columns-repeated="4"/>
          <table:table-cell table:style-name="ce1" office:value-type="date" office:date-value="2025-11-21" calcext:value-type="date">
            <text:p>2025-11-21</text:p>
          </table:table-cell>
          <table:table-cell table:style-name="ce2" office:value-type="string" calcext:value-type="string">
            <text:p>09:00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1-21T08:41:15.402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Dotazník spokojenosti Kalibro</text:p>
          </table:table-cell>
          <table:table-cell table:number-columns-repeated="4"/>
          <table:table-cell table:style-name="ce1" office:value-type="date" office:date-value="2025-11-21" calcext:value-type="date">
            <text:p>2025-11-21</text:p>
          </table:table-cell>
          <table:table-cell table:style-name="ce2" office:value-type="string" calcext:value-type="string">
            <text:p>09:00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1-21T08:40:37.769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Dotazník spokojenosti Kalibro</text:p>
          </table:table-cell>
          <table:table-cell table:number-columns-repeated="4"/>
          <table:table-cell table:style-name="ce1" office:value-type="date" office:date-value="2025-11-21" calcext:value-type="date">
            <text:p>2025-11-21</text:p>
          </table:table-cell>
          <table:table-cell table:style-name="ce2" office:value-type="string" calcext:value-type="string">
            <text:p>09:00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21T11:59:24.068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Dotazník spokojenosti Kalibro</text:p>
          </table:table-cell>
          <table:table-cell table:number-columns-repeated="4"/>
          <table:table-cell table:style-name="ce1" office:value-type="date" office:date-value="2025-11-21" calcext:value-type="date">
            <text:p>2025-11-21</text:p>
          </table:table-cell>
          <table:table-cell table:style-name="ce2" office:value-type="string" calcext:value-type="string">
            <text:p>09:00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21T08:52:28.248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Dotazník spokojenosti Kalibro</text:p>
          </table:table-cell>
          <table:table-cell table:number-columns-repeated="4"/>
          <table:table-cell table:style-name="ce1" office:value-type="date" office:date-value="2025-11-21" calcext:value-type="date">
            <text:p>2025-11-21</text:p>
          </table:table-cell>
          <table:table-cell table:style-name="ce2" office:value-type="string" calcext:value-type="string">
            <text:p>09:00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21T08:48:16.885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Dotazník spokojenosti Kalibro</text:p>
          </table:table-cell>
          <table:table-cell table:number-columns-repeated="4"/>
          <table:table-cell table:style-name="ce1" office:value-type="date" office:date-value="2025-11-21" calcext:value-type="date">
            <text:p>2025-11-21</text:p>
          </table:table-cell>
          <table:table-cell table:style-name="ce2" office:value-type="string" calcext:value-type="string">
            <text:p>09:00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1-21T08:40:13.974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Dotazník spokojenosti Kalibro</text:p>
          </table:table-cell>
          <table:table-cell table:number-columns-repeated="4"/>
          <table:table-cell table:style-name="ce1" office:value-type="date" office:date-value="2025-11-21" calcext:value-type="date">
            <text:p>2025-11-21</text:p>
          </table:table-cell>
          <table:table-cell table:style-name="ce2" office:value-type="string" calcext:value-type="string">
            <text:p>09:00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1-21T08:40:33.591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Dotazník spokojenosti Kalibro</text:p>
          </table:table-cell>
          <table:table-cell table:number-columns-repeated="4"/>
          <table:table-cell table:style-name="ce1" office:value-type="date" office:date-value="2025-11-21" calcext:value-type="date">
            <text:p>2025-11-21</text:p>
          </table:table-cell>
          <table:table-cell table:style-name="ce2" office:value-type="string" calcext:value-type="string">
            <text:p>09:00:0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5-11-21T08:40:51.225Z</text:p>
          </table:table-cell>
          <table:table-cell office:value-type="string" calcext:value-type="string">
            <text:p>2025-11-21T08:40:51.226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Dotazník spokojenosti Kalibro</text:p>
          </table:table-cell>
          <table:table-cell table:number-columns-repeated="4"/>
          <table:table-cell table:style-name="ce1" office:value-type="date" office:date-value="2025-11-21" calcext:value-type="date">
            <text:p>2025-11-21</text:p>
          </table:table-cell>
          <table:table-cell table:style-name="ce2" office:value-type="string" calcext:value-type="string">
            <text:p>09:00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1-21T08:40:28.873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Dotazník spokojenosti Kalibro</text:p>
          </table:table-cell>
          <table:table-cell table:number-columns-repeated="4"/>
          <table:table-cell table:style-name="ce1" office:value-type="date" office:date-value="2025-11-21" calcext:value-type="date">
            <text:p>2025-11-21</text:p>
          </table:table-cell>
          <table:table-cell table:style-name="ce2" office:value-type="string" calcext:value-type="string">
            <text:p>09:00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1-21T08:42:10.324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Dotazník spokojenosti Kalibro</text:p>
          </table:table-cell>
          <table:table-cell table:number-columns-repeated="4"/>
          <table:table-cell table:style-name="ce1" office:value-type="date" office:date-value="2025-11-21" calcext:value-type="date">
            <text:p>2025-11-21</text:p>
          </table:table-cell>
          <table:table-cell table:style-name="ce2" office:value-type="string" calcext:value-type="string">
            <text:p>09:00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19T07:47:09.396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Dotazník spokojenosti Kalibro</text:p>
          </table:table-cell>
          <table:table-cell table:number-columns-repeated="4"/>
          <table:table-cell table:style-name="ce1" office:value-type="date" office:date-value="2025-11-21" calcext:value-type="date">
            <text:p>2025-11-21</text:p>
          </table:table-cell>
          <table:table-cell table:style-name="ce2" office:value-type="string" calcext:value-type="string">
            <text:p>09:00:00</text:p>
          </table:table-cell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Dotazník spokojenosti Kalibro</text:p>
          </table:table-cell>
          <table:table-cell table:number-columns-repeated="4"/>
          <table:table-cell table:style-name="ce1" office:value-type="date" office:date-value="2025-11-21" calcext:value-type="date">
            <text:p>2025-11-21</text:p>
          </table:table-cell>
          <table:table-cell table:style-name="ce2" office:value-type="string" calcext:value-type="string">
            <text:p>09:00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1-21T08:40:25.095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Dotazník spokojenosti Kalibro</text:p>
          </table:table-cell>
          <table:table-cell table:number-columns-repeated="4"/>
          <table:table-cell table:style-name="ce1" office:value-type="date" office:date-value="2025-11-21" calcext:value-type="date">
            <text:p>2025-11-21</text:p>
          </table:table-cell>
          <table:table-cell table:style-name="ce2" office:value-type="string" calcext:value-type="string">
            <text:p>09:00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21T08:54:34.680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Dotazník spokojenosti Kalibro</text:p>
          </table:table-cell>
          <table:table-cell table:number-columns-repeated="4"/>
          <table:table-cell table:style-name="ce1" office:value-type="date" office:date-value="2025-11-21" calcext:value-type="date">
            <text:p>2025-11-21</text:p>
          </table:table-cell>
          <table:table-cell table:style-name="ce2" office:value-type="string" calcext:value-type="string">
            <text:p>09:00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21T08:51:41.780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Osadníci z katanu</text:p>
          </table:table-cell>
          <table:table-cell office:value-type="float" office:value="831590471760" calcext:value-type="float">
            <text:p>831590471760</text:p>
          </table:table-cell>
          <table:table-cell office:value-type="string" calcext:value-type="string">
            <text:p>Zadání jednotlivých projektů</text:p>
          </table:table-cell>
          <table:table-cell table:number-columns-repeated="4"/>
          <table:table-cell office:value-type="string" calcext:value-type="string">
            <text:p>CREATED</text:p>
          </table:table-cell>
          <table:table-cell office:value-type="string" calcext:value-type="string">
            <text:p>2025-11-28T08:34:10.596Z</text:p>
          </table:table-cell>
          <table:table-cell office:value-type="string" calcext:value-type="string">
            <text:p>2025-11-28T08:34:10.597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Osadníci z katanu</text:p>
          </table:table-cell>
          <table:table-cell office:value-type="float" office:value="831590471760" calcext:value-type="float">
            <text:p>831590471760</text:p>
          </table:table-cell>
          <table:table-cell office:value-type="string" calcext:value-type="string">
            <text:p>Zadání jednotlivých projektů</text:p>
          </table:table-cell>
          <table:table-cell table:number-columns-repeated="4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1-28T08:34:01.058Z</text:p>
          </table:table-cell>
        </table:table-row>
        <table:table-row table:style-name="ro1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Build an RPG Creature Search App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4-12" calcext:value-type="date">
            <text:p>2026-04-12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45.673Z</text:p>
          </table:table-cell>
        </table:table-row>
        <table:table-row table:style-name="ro1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Build an RPG Creature Search App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4-12" calcext:value-type="date">
            <text:p>2026-04-12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3.017Z</text:p>
          </table:table-cell>
        </table:table-row>
        <table:table-row table:style-name="ro1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Build an RPG Creature Search App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4-12" calcext:value-type="date">
            <text:p>2026-04-12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5-10-17T13:23:37.711Z</text:p>
          </table:table-cell>
          <table:table-cell office:value-type="string" calcext:value-type="string">
            <text:p>2025-10-17T13:23:37.712Z</text:p>
          </table:table-cell>
        </table:table-row>
        <table:table-row table:style-name="ro1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Build an RPG Creature Search App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4-12" calcext:value-type="date">
            <text:p>2026-04-12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8.278Z</text:p>
          </table:table-cell>
        </table:table-row>
        <table:table-row table:style-name="ro1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Build an RPG Creature Search App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4-12" calcext:value-type="date">
            <text:p>2026-04-12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5-10-17T13:24:55.448Z</text:p>
          </table:table-cell>
          <table:table-cell office:value-type="string" calcext:value-type="string">
            <text:p>2025-10-17T13:24:55.449Z</text:p>
          </table:table-cell>
        </table:table-row>
        <table:table-row table:style-name="ro1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Build an RPG Creature Search App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4-12" calcext:value-type="date">
            <text:p>2026-04-12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4.247Z</text:p>
          </table:table-cell>
        </table:table-row>
        <table:table-row table:style-name="ro1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Build an RPG Creature Search App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4-12" calcext:value-type="date">
            <text:p>2026-04-12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6.759Z</text:p>
          </table:table-cell>
        </table:table-row>
        <table:table-row table:style-name="ro1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Build an RPG Creature Search App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4-12" calcext:value-type="date">
            <text:p>2026-04-12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2.628Z</text:p>
          </table:table-cell>
        </table:table-row>
        <table:table-row table:style-name="ro1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Build an RPG Creature Search App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4-12" calcext:value-type="date">
            <text:p>2026-04-12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7.335Z</text:p>
          </table:table-cell>
        </table:table-row>
        <table:table-row table:style-name="ro1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Build an RPG Creature Search App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4-12" calcext:value-type="date">
            <text:p>2026-04-12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5-10-17T13:23:44.779Z</text:p>
          </table:table-cell>
          <table:table-cell office:value-type="string" calcext:value-type="string">
            <text:p>2025-10-17T13:23:44.786Z</text:p>
          </table:table-cell>
        </table:table-row>
        <table:table-row table:style-name="ro1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Build an RPG Creature Search App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4-12" calcext:value-type="date">
            <text:p>2026-04-12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2-06T21:42:47.469Z</text:p>
          </table:table-cell>
        </table:table-row>
        <table:table-row table:style-name="ro1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Build an RPG Creature Search App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4-12" calcext:value-type="date">
            <text:p>2026-04-12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25.410Z</text:p>
          </table:table-cell>
        </table:table-row>
        <table:table-row table:style-name="ro1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Build an RPG Creature Search App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4-12" calcext:value-type="date">
            <text:p>2026-04-12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20.366Z</text:p>
          </table:table-cell>
        </table:table-row>
        <table:table-row table:style-name="ro1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Build an RPG Creature Search App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4-12" calcext:value-type="date">
            <text:p>2026-04-12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8.871Z</text:p>
          </table:table-cell>
        </table:table-row>
        <table:table-row table:style-name="ro1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Build an RPG Creature Search App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4-12" calcext:value-type="date">
            <text:p>2026-04-12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5-10-17T13:24:28.332Z</text:p>
          </table:table-cell>
          <table:table-cell office:value-type="string" calcext:value-type="string">
            <text:p>2025-10-17T13:24:28.333Z</text:p>
          </table:table-cell>
        </table:table-row>
        <table:table-row table:style-name="ro1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Build an RPG Creature Search App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4-12" calcext:value-type="date">
            <text:p>2026-04-12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26.151Z</text:p>
          </table:table-cell>
        </table:table-row>
        <table:table-row table:style-name="ro1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Build an RPG Creature Search App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4-12" calcext:value-type="date">
            <text:p>2026-04-12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41.332Z</text:p>
          </table:table-cell>
        </table:table-row>
        <table:table-row table:style-name="ro1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Build an RPG Creature Search App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4-12" calcext:value-type="date">
            <text:p>2026-04-12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Build an RPG Creature Search App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4-12" calcext:value-type="date">
            <text:p>2026-04-12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5-10-17T13:23:47.723Z</text:p>
          </table:table-cell>
          <table:table-cell office:value-type="string" calcext:value-type="string">
            <text:p>2025-10-17T13:23:47.724Z</text:p>
          </table:table-cell>
        </table:table-row>
        <table:table-row table:style-name="ro1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Build an RPG Creature Search App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4-12" calcext:value-type="date">
            <text:p>2026-04-12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8.483Z</text:p>
          </table:table-cell>
        </table:table-row>
        <table:table-row table:style-name="ro1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Build an RPG Creature Search App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4-12" calcext:value-type="date">
            <text:p>2026-04-12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5-10-17T13:24:23.646Z</text:p>
          </table:table-cell>
          <table:table-cell office:value-type="string" calcext:value-type="string">
            <text:p>2025-10-17T13:24:23.648Z</text:p>
          </table:table-cell>
        </table:table-row>
        <table:table-row table:style-name="ro1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Build a Cash Regis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3-15" calcext:value-type="date">
            <text:p>2026-03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9.991Z</text:p>
          </table:table-cell>
        </table:table-row>
        <table:table-row table:style-name="ro1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Build a Cash Regis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3-15" calcext:value-type="date">
            <text:p>2026-03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08.731Z</text:p>
          </table:table-cell>
        </table:table-row>
        <table:table-row table:style-name="ro1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Build a Cash Regis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3-15" calcext:value-type="date">
            <text:p>2026-03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5-10-17T13:23:35.798Z</text:p>
          </table:table-cell>
          <table:table-cell office:value-type="string" calcext:value-type="string">
            <text:p>2025-10-17T13:23:35.799Z</text:p>
          </table:table-cell>
        </table:table-row>
        <table:table-row table:style-name="ro1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Build a Cash Regis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3-15" calcext:value-type="date">
            <text:p>2026-03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7.406Z</text:p>
          </table:table-cell>
        </table:table-row>
        <table:table-row table:style-name="ro1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Build a Cash Regis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3-15" calcext:value-type="date">
            <text:p>2026-03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7.946Z</text:p>
          </table:table-cell>
        </table:table-row>
        <table:table-row table:style-name="ro1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Build a Cash Regis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3-15" calcext:value-type="date">
            <text:p>2026-03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5-10-17T13:24:23.733Z</text:p>
          </table:table-cell>
          <table:table-cell office:value-type="string" calcext:value-type="string">
            <text:p>2025-10-17T13:24:23.734Z</text:p>
          </table:table-cell>
        </table:table-row>
        <table:table-row table:style-name="ro1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Build a Cash Regis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3-15" calcext:value-type="date">
            <text:p>2026-03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02.509Z</text:p>
          </table:table-cell>
        </table:table-row>
        <table:table-row table:style-name="ro1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Build a Cash Regis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3-15" calcext:value-type="date">
            <text:p>2026-03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5-10-17T13:24:15.696Z</text:p>
          </table:table-cell>
          <table:table-cell office:value-type="string" calcext:value-type="string">
            <text:p>2025-10-17T13:24:15.697Z</text:p>
          </table:table-cell>
        </table:table-row>
        <table:table-row table:style-name="ro1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Build a Cash Regis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3-15" calcext:value-type="date">
            <text:p>2026-03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3.668Z</text:p>
          </table:table-cell>
        </table:table-row>
        <table:table-row table:style-name="ro1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Build a Cash Regis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3-15" calcext:value-type="date">
            <text:p>2026-03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1-23T09:28:03.491Z</text:p>
          </table:table-cell>
        </table:table-row>
        <table:table-row table:style-name="ro1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Build a Cash Regis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3-15" calcext:value-type="date">
            <text:p>2026-03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2-06T21:46:38.950Z</text:p>
          </table:table-cell>
        </table:table-row>
        <table:table-row table:style-name="ro1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Build a Cash Regis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3-15" calcext:value-type="date">
            <text:p>2026-03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23.143Z</text:p>
          </table:table-cell>
        </table:table-row>
        <table:table-row table:style-name="ro1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Build a Cash Regis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3-15" calcext:value-type="date">
            <text:p>2026-03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09.191Z</text:p>
          </table:table-cell>
        </table:table-row>
        <table:table-row table:style-name="ro1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Build a Cash Regis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3-15" calcext:value-type="date">
            <text:p>2026-03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6.460Z</text:p>
          </table:table-cell>
        </table:table-row>
        <table:table-row table:style-name="ro1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Build a Cash Regis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3-15" calcext:value-type="date">
            <text:p>2026-03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04.541Z</text:p>
          </table:table-cell>
        </table:table-row>
        <table:table-row table:style-name="ro1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Build a Cash Regis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3-15" calcext:value-type="date">
            <text:p>2026-03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5-10-17T13:25:35.103Z</text:p>
          </table:table-cell>
          <table:table-cell office:value-type="string" calcext:value-type="string">
            <text:p>2025-10-17T13:25:35.104Z</text:p>
          </table:table-cell>
        </table:table-row>
        <table:table-row table:style-name="ro1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Build a Cash Regis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3-15" calcext:value-type="date">
            <text:p>2026-03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45.415Z</text:p>
          </table:table-cell>
        </table:table-row>
        <table:table-row table:style-name="ro1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Build a Cash Regis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3-15" calcext:value-type="date">
            <text:p>2026-03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Build a Cash Regis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3-15" calcext:value-type="date">
            <text:p>2026-03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0.451Z</text:p>
          </table:table-cell>
        </table:table-row>
        <table:table-row table:style-name="ro1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Build a Cash Regis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3-15" calcext:value-type="date">
            <text:p>2026-03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1.494Z</text:p>
          </table:table-cell>
        </table:table-row>
        <table:table-row table:style-name="ro1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Build a Cash Regis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3-15" calcext:value-type="date">
            <text:p>2026-03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5-10-17T13:23:54.800Z</text:p>
          </table:table-cell>
          <table:table-cell office:value-type="string" calcext:value-type="string">
            <text:p>2025-10-17T13:23:54.801Z</text:p>
          </table:table-cell>
        </table:table-row>
        <table:table-row table:style-name="ro1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Build a Telephone Number Validato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2-15" calcext:value-type="date">
            <text:p>2026-02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43.520Z</text:p>
          </table:table-cell>
        </table:table-row>
        <table:table-row table:style-name="ro1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Build a Telephone Number Validato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2-15" calcext:value-type="date">
            <text:p>2026-02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8.785Z</text:p>
          </table:table-cell>
        </table:table-row>
        <table:table-row table:style-name="ro1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Build a Telephone Number Validato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2-15" calcext:value-type="date">
            <text:p>2026-02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1-23T07:45:15.398Z</text:p>
          </table:table-cell>
        </table:table-row>
        <table:table-row table:style-name="ro1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Build a Telephone Number Validato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2-15" calcext:value-type="date">
            <text:p>2026-02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office:value-type="string" calcext:value-type="string">
            <text:p>2026-02-15T16:33:57.800Z</text:p>
          </table:table-cell>
          <table:table-cell office:value-type="string" calcext:value-type="string">
            <text:p>2026-02-15T16:33:57.801Z</text:p>
          </table:table-cell>
        </table:table-row>
        <table:table-row table:style-name="ro1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Build a Telephone Number Validato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2-15" calcext:value-type="date">
            <text:p>2026-02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00.870Z</text:p>
          </table:table-cell>
        </table:table-row>
        <table:table-row table:style-name="ro1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Build a Telephone Number Validato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2-15" calcext:value-type="date">
            <text:p>2026-02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7.799Z</text:p>
          </table:table-cell>
        </table:table-row>
        <table:table-row table:style-name="ro1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Build a Telephone Number Validato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2-15" calcext:value-type="date">
            <text:p>2026-02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0.683Z</text:p>
          </table:table-cell>
        </table:table-row>
        <table:table-row table:style-name="ro1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Build a Telephone Number Validato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2-15" calcext:value-type="date">
            <text:p>2026-02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4.064Z</text:p>
          </table:table-cell>
        </table:table-row>
        <table:table-row table:style-name="ro1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Build a Telephone Number Validato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2-15" calcext:value-type="date">
            <text:p>2026-02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1.213Z</text:p>
          </table:table-cell>
        </table:table-row>
        <table:table-row table:style-name="ro1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Build a Telephone Number Validato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2-15" calcext:value-type="date">
            <text:p>2026-02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12T09:53:13.283Z</text:p>
          </table:table-cell>
        </table:table-row>
        <table:table-row table:style-name="ro1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Build a Telephone Number Validato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2-15" calcext:value-type="date">
            <text:p>2026-02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2-06T21:48:50.903Z</text:p>
          </table:table-cell>
        </table:table-row>
        <table:table-row table:style-name="ro1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Build a Telephone Number Validato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2-15" calcext:value-type="date">
            <text:p>2026-02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5-10-17T13:23:26.037Z</text:p>
          </table:table-cell>
          <table:table-cell office:value-type="string" calcext:value-type="string">
            <text:p>2025-10-17T13:23:26.038Z</text:p>
          </table:table-cell>
        </table:table-row>
        <table:table-row table:style-name="ro1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Build a Telephone Number Validato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2-15" calcext:value-type="date">
            <text:p>2026-02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2-09T17:19:03.819Z</text:p>
          </table:table-cell>
        </table:table-row>
        <table:table-row table:style-name="ro1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Build a Telephone Number Validato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2-15" calcext:value-type="date">
            <text:p>2026-02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5.104Z</text:p>
          </table:table-cell>
        </table:table-row>
        <table:table-row table:style-name="ro1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Build a Telephone Number Validato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2-15" calcext:value-type="date">
            <text:p>2026-02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5-10-17T13:24:51.191Z</text:p>
          </table:table-cell>
          <table:table-cell office:value-type="string" calcext:value-type="string">
            <text:p>2025-10-17T13:24:51.192Z</text:p>
          </table:table-cell>
        </table:table-row>
        <table:table-row table:style-name="ro1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Build a Telephone Number Validato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2-15" calcext:value-type="date">
            <text:p>2026-02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17.241Z</text:p>
          </table:table-cell>
        </table:table-row>
        <table:table-row table:style-name="ro1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Build a Telephone Number Validato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2-15" calcext:value-type="date">
            <text:p>2026-02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5-10-17T13:25:25.970Z</text:p>
          </table:table-cell>
          <table:table-cell office:value-type="string" calcext:value-type="string">
            <text:p>2025-10-17T13:25:25.971Z</text:p>
          </table:table-cell>
        </table:table-row>
        <table:table-row table:style-name="ro1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Build a Telephone Number Validato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2-15" calcext:value-type="date">
            <text:p>2026-02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Build a Telephone Number Validato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2-15" calcext:value-type="date">
            <text:p>2026-02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5-10-17T13:23:39.294Z</text:p>
          </table:table-cell>
          <table:table-cell office:value-type="string" calcext:value-type="string">
            <text:p>2025-10-17T13:23:39.300Z</text:p>
          </table:table-cell>
        </table:table-row>
        <table:table-row table:style-name="ro1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Build a Telephone Number Validato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2-15" calcext:value-type="date">
            <text:p>2026-02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9.565Z</text:p>
          </table:table-cell>
        </table:table-row>
        <table:table-row table:style-name="ro1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Build a Telephone Number Validato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2-15" calcext:value-type="date">
            <text:p>2026-02-1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2-13T17:14:06.830Z</text:p>
          </table:table-cell>
        </table:table-row>
        <table:table-row table:style-name="ro1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Build a Roman Numeral Conver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25" calcext:value-type="date">
            <text:p>2026-01-2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11.117Z</text:p>
          </table:table-cell>
        </table:table-row>
        <table:table-row table:style-name="ro1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Build a Roman Numeral Conver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25" calcext:value-type="date">
            <text:p>2026-01-2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9.543Z</text:p>
          </table:table-cell>
        </table:table-row>
        <table:table-row table:style-name="ro1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Build a Roman Numeral Conver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25" calcext:value-type="date">
            <text:p>2026-01-2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office:value-type="string" calcext:value-type="string">
            <text:p>2026-01-23T07:47:32.224Z</text:p>
          </table:table-cell>
          <table:table-cell office:value-type="string" calcext:value-type="string">
            <text:p>2026-01-23T07:47:32.225Z</text:p>
          </table:table-cell>
        </table:table-row>
        <table:table-row table:style-name="ro1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Build a Roman Numeral Conver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25" calcext:value-type="date">
            <text:p>2026-01-2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28T08:35:46.849Z</text:p>
          </table:table-cell>
        </table:table-row>
        <table:table-row table:style-name="ro1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Build a Roman Numeral Conver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25" calcext:value-type="date">
            <text:p>2026-01-2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9.750Z</text:p>
          </table:table-cell>
        </table:table-row>
        <table:table-row table:style-name="ro1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Build a Roman Numeral Conver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25" calcext:value-type="date">
            <text:p>2026-01-2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6.011Z</text:p>
          </table:table-cell>
        </table:table-row>
        <table:table-row table:style-name="ro1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Build a Roman Numeral Conver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25" calcext:value-type="date">
            <text:p>2026-01-2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5.354Z</text:p>
          </table:table-cell>
        </table:table-row>
        <table:table-row table:style-name="ro1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Build a Roman Numeral Conver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25" calcext:value-type="date">
            <text:p>2026-01-2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7.507Z</text:p>
          </table:table-cell>
        </table:table-row>
        <table:table-row table:style-name="ro1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Build a Roman Numeral Conver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25" calcext:value-type="date">
            <text:p>2026-01-2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5-10-17T13:23:50.445Z</text:p>
          </table:table-cell>
          <table:table-cell office:value-type="string" calcext:value-type="string">
            <text:p>2025-10-17T13:23:50.446Z</text:p>
          </table:table-cell>
        </table:table-row>
        <table:table-row table:style-name="ro1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Build a Roman Numeral Conver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25" calcext:value-type="date">
            <text:p>2026-01-2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05T10:24:48.854Z</text:p>
          </table:table-cell>
        </table:table-row>
        <table:table-row table:style-name="ro1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Build a Roman Numeral Conver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25" calcext:value-type="date">
            <text:p>2026-01-2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2-06T21:24:33.253Z</text:p>
          </table:table-cell>
        </table:table-row>
        <table:table-row table:style-name="ro1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Build a Roman Numeral Conver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25" calcext:value-type="date">
            <text:p>2026-01-2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5-10-17T13:23:22.979Z</text:p>
          </table:table-cell>
          <table:table-cell office:value-type="string" calcext:value-type="string">
            <text:p>2025-10-17T13:23:22.980Z</text:p>
          </table:table-cell>
        </table:table-row>
        <table:table-row table:style-name="ro1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Build a Roman Numeral Conver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25" calcext:value-type="date">
            <text:p>2026-01-2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office:value-type="string" calcext:value-type="string">
            <text:p>2026-02-09T17:17:58.301Z</text:p>
          </table:table-cell>
          <table:table-cell office:value-type="string" calcext:value-type="string">
            <text:p>2026-02-09T17:17:58.302Z</text:p>
          </table:table-cell>
        </table:table-row>
        <table:table-row table:style-name="ro1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Build a Roman Numeral Conver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25" calcext:value-type="date">
            <text:p>2026-01-2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5-10-17T13:24:09.664Z</text:p>
          </table:table-cell>
          <table:table-cell office:value-type="string" calcext:value-type="string">
            <text:p>2025-10-17T13:24:09.665Z</text:p>
          </table:table-cell>
        </table:table-row>
        <table:table-row table:style-name="ro1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Build a Roman Numeral Conver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25" calcext:value-type="date">
            <text:p>2026-01-2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5-10-17T13:24:38.572Z</text:p>
          </table:table-cell>
          <table:table-cell office:value-type="string" calcext:value-type="string">
            <text:p>2025-10-17T13:24:38.574Z</text:p>
          </table:table-cell>
        </table:table-row>
        <table:table-row table:style-name="ro1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Build a Roman Numeral Conver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25" calcext:value-type="date">
            <text:p>2026-01-2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6:03.729Z</text:p>
          </table:table-cell>
        </table:table-row>
        <table:table-row table:style-name="ro1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Build a Roman Numeral Conver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25" calcext:value-type="date">
            <text:p>2026-01-2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54.240Z</text:p>
          </table:table-cell>
        </table:table-row>
        <table:table-row table:style-name="ro1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Build a Roman Numeral Conver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25" calcext:value-type="date">
            <text:p>2026-01-2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6-01-16T07:38:52.780Z</text:p>
          </table:table-cell>
        </table:table-row>
        <table:table-row table:style-name="ro1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Build a Roman Numeral Conver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25" calcext:value-type="date">
            <text:p>2026-01-2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0.350Z</text:p>
          </table:table-cell>
        </table:table-row>
        <table:table-row table:style-name="ro1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Build a Roman Numeral Conver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25" calcext:value-type="date">
            <text:p>2026-01-2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3.564Z</text:p>
          </table:table-cell>
        </table:table-row>
        <table:table-row table:style-name="ro1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Build a Roman Numeral Convert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25" calcext:value-type="date">
            <text:p>2026-01-25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1-23T10:47:33.334Z</text:p>
          </table:table-cell>
        </table:table-row>
        <table:table-row table:style-name="ro1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Build a Palindrome Check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11" calcext:value-type="date">
            <text:p>2026-01-1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12.526Z</text:p>
          </table:table-cell>
        </table:table-row>
        <table:table-row table:style-name="ro1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Build a Palindrome Check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11" calcext:value-type="date">
            <text:p>2026-01-1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6.374Z</text:p>
          </table:table-cell>
        </table:table-row>
        <table:table-row table:style-name="ro1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Build a Palindrome Check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11" calcext:value-type="date">
            <text:p>2026-01-1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1-23T07:48:55.641Z</text:p>
          </table:table-cell>
        </table:table-row>
        <table:table-row table:style-name="ro1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Build a Palindrome Check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11" calcext:value-type="date">
            <text:p>2026-01-1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office:value-type="string" calcext:value-type="string">
            <text:p>2026-01-16T07:46:47.535Z</text:p>
          </table:table-cell>
          <table:table-cell office:value-type="string" calcext:value-type="string">
            <text:p>2026-01-16T07:46:47.536Z</text:p>
          </table:table-cell>
        </table:table-row>
        <table:table-row table:style-name="ro1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Build a Palindrome Check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11" calcext:value-type="date">
            <text:p>2026-01-1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05T08:41:11.592Z</text:p>
          </table:table-cell>
        </table:table-row>
        <table:table-row table:style-name="ro1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Build a Palindrome Check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11" calcext:value-type="date">
            <text:p>2026-01-1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6.424Z</text:p>
          </table:table-cell>
        </table:table-row>
        <table:table-row table:style-name="ro1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Build a Palindrome Check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11" calcext:value-type="date">
            <text:p>2026-01-1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33.630Z</text:p>
          </table:table-cell>
        </table:table-row>
        <table:table-row table:style-name="ro1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Build a Palindrome Check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11" calcext:value-type="date">
            <text:p>2026-01-1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2-13T07:39:34.877Z</text:p>
          </table:table-cell>
        </table:table-row>
        <table:table-row table:style-name="ro1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Build a Palindrome Check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11" calcext:value-type="date">
            <text:p>2026-01-1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8.751Z</text:p>
          </table:table-cell>
        </table:table-row>
        <table:table-row table:style-name="ro1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Build a Palindrome Check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11" calcext:value-type="date">
            <text:p>2026-01-1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07T08:55:48.728Z</text:p>
          </table:table-cell>
        </table:table-row>
        <table:table-row table:style-name="ro1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Build a Palindrome Check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11" calcext:value-type="date">
            <text:p>2026-01-1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2-06T21:22:52.226Z</text:p>
          </table:table-cell>
        </table:table-row>
        <table:table-row table:style-name="ro1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Build a Palindrome Check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11" calcext:value-type="date">
            <text:p>2026-01-1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5-10-17T13:23:22.489Z</text:p>
          </table:table-cell>
          <table:table-cell office:value-type="string" calcext:value-type="string">
            <text:p>2025-10-17T13:23:22.490Z</text:p>
          </table:table-cell>
        </table:table-row>
        <table:table-row table:style-name="ro1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Build a Palindrome Check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11" calcext:value-type="date">
            <text:p>2026-01-1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2-09T17:17:09.054Z</text:p>
          </table:table-cell>
        </table:table-row>
        <table:table-row table:style-name="ro1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Build a Palindrome Check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11" calcext:value-type="date">
            <text:p>2026-01-1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1.816Z</text:p>
          </table:table-cell>
        </table:table-row>
        <table:table-row table:style-name="ro1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Build a Palindrome Check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11" calcext:value-type="date">
            <text:p>2026-01-1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3.447Z</text:p>
          </table:table-cell>
        </table:table-row>
        <table:table-row table:style-name="ro1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Build a Palindrome Check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11" calcext:value-type="date">
            <text:p>2026-01-1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5-10-17T13:25:53.108Z</text:p>
          </table:table-cell>
          <table:table-cell office:value-type="string" calcext:value-type="string">
            <text:p>2025-10-17T13:25:53.109Z</text:p>
          </table:table-cell>
        </table:table-row>
        <table:table-row table:style-name="ro1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Build a Palindrome Check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11" calcext:value-type="date">
            <text:p>2026-01-1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1.510Z</text:p>
          </table:table-cell>
        </table:table-row>
        <table:table-row table:style-name="ro1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Build a Palindrome Check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11" calcext:value-type="date">
            <text:p>2026-01-1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6-01-16T07:39:42.163Z</text:p>
          </table:table-cell>
        </table:table-row>
        <table:table-row table:style-name="ro1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Build a Palindrome Check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11" calcext:value-type="date">
            <text:p>2026-01-1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35.907Z</text:p>
          </table:table-cell>
        </table:table-row>
        <table:table-row table:style-name="ro1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Build a Palindrome Check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11" calcext:value-type="date">
            <text:p>2026-01-1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1.757Z</text:p>
          </table:table-cell>
        </table:table-row>
        <table:table-row table:style-name="ro1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Build a Palindrome Checker Project</text:p>
          </table:table-cell>
          <table:table-cell office:value-type="float" office:value="813362198815" calcext:value-type="float">
            <text:p>813362198815</text:p>
          </table:table-cell>
          <table:table-cell office:value-type="string" calcext:value-type="string">
            <text:p>JavaScript –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11" calcext:value-type="date">
            <text:p>2026-01-1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7.548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Personal Portfolio Web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04" calcext:value-type="date">
            <text:p>2026-01-0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12T09:10:07.307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Personal Portfolio Web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04" calcext:value-type="date">
            <text:p>2026-01-0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3.902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Personal Portfolio Web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04" calcext:value-type="date">
            <text:p>2026-01-0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08.572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Personal Portfolio Web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04" calcext:value-type="date">
            <text:p>2026-01-0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1-23T08:01:25.981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Personal Portfolio Web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04" calcext:value-type="date">
            <text:p>2026-01-0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0-24T06:40:31.437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Personal Portfolio Web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04" calcext:value-type="date">
            <text:p>2026-01-0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1-23T08:10:28.054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Personal Portfolio Web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04" calcext:value-type="date">
            <text:p>2026-01-0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1-04T10:52:15.576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Personal Portfolio Web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04" calcext:value-type="date">
            <text:p>2026-01-0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14T07:24:51.010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Personal Portfolio Web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04" calcext:value-type="date">
            <text:p>2026-01-0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14T07:47:38.008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Personal Portfolio Web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04" calcext:value-type="date">
            <text:p>2026-01-0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03T12:12:39.785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Personal Portfolio Web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04" calcext:value-type="date">
            <text:p>2026-01-0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21T14:59:45.427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Personal Portfolio Web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04" calcext:value-type="date">
            <text:p>2026-01-0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1-19T20:10:34.087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Personal Portfolio Web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04" calcext:value-type="date">
            <text:p>2026-01-0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14T07:38:47.297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Personal Portfolio Web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04" calcext:value-type="date">
            <text:p>2026-01-0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0.957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Personal Portfolio Web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04" calcext:value-type="date">
            <text:p>2026-01-0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7.546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Personal Portfolio Web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04" calcext:value-type="date">
            <text:p>2026-01-0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office:value-type="string" calcext:value-type="string">
            <text:p>2026-01-23T07:47:35.236Z</text:p>
          </table:table-cell>
          <table:table-cell office:value-type="string" calcext:value-type="string">
            <text:p>2026-01-23T07:47:35.237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Personal Portfolio Web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04" calcext:value-type="date">
            <text:p>2026-01-0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19T08:10:28.341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Personal Portfolio Web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04" calcext:value-type="date">
            <text:p>2026-01-0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Personal Portfolio Web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04" calcext:value-type="date">
            <text:p>2026-01-0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34.411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Personal Portfolio Web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04" calcext:value-type="date">
            <text:p>2026-01-0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1-16T08:07:43.964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Personal Portfolio Web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1-04" calcext:value-type="date">
            <text:p>2026-01-0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21T08:19:21.170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Product Landing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2-14" calcext:value-type="date">
            <text:p>2025-12-1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2-12T08:35:54.966Z</text:p>
          </table:table-cell>
          <table:table-cell office:value-type="string" calcext:value-type="string">
            <text:p>2026-01-16T08:46:35.488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Product Landing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12-14" calcext:value-type="date">
            <text:p>2025-12-1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08T08:15:25.870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Product Landing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12-14" calcext:value-type="date">
            <text:p>2025-12-1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5-10-17T13:23:12.781Z</text:p>
          </table:table-cell>
          <table:table-cell office:value-type="string" calcext:value-type="string">
            <text:p>2025-10-17T13:23:12.788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Product Landing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12-14" calcext:value-type="date">
            <text:p>2025-12-1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office:value-type="string" calcext:value-type="string">
            <text:p>2026-01-17T14:08:29.114Z</text:p>
          </table:table-cell>
          <table:table-cell office:value-type="string" calcext:value-type="string">
            <text:p>2026-01-17T14:08:29.115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Product Landing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2-14" calcext:value-type="date">
            <text:p>2025-12-1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0-24T06:39:37.917Z</text:p>
          </table:table-cell>
          <table:table-cell office:value-type="string" calcext:value-type="string">
            <text:p>2026-01-16T08:46:49.242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Product Landing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12-14" calcext:value-type="date">
            <text:p>2025-12-1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12T07:47:44.114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Product Landing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12-14" calcext:value-type="date">
            <text:p>2025-12-1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12T08:25:37.803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Product Landing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2-14" calcext:value-type="date">
            <text:p>2025-12-1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1-14T07:25:25.865Z</text:p>
          </table:table-cell>
          <table:table-cell office:value-type="string" calcext:value-type="string">
            <text:p>2026-01-16T08:46:19.478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Product Landing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12-14" calcext:value-type="date">
            <text:p>2025-12-1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37.124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Product Landing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12-14" calcext:value-type="date">
            <text:p>2025-12-1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03T12:11:31.534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Product Landing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12-14" calcext:value-type="date">
            <text:p>2025-12-1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21T14:46:56.742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Product Landing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12-14" calcext:value-type="date">
            <text:p>2025-12-1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1-19T20:26:24.483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Product Landing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12-14" calcext:value-type="date">
            <text:p>2025-12-1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14T07:37:46.888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Product Landing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12-14" calcext:value-type="date">
            <text:p>2025-12-1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5-10-17T13:24:00.723Z</text:p>
          </table:table-cell>
          <table:table-cell office:value-type="string" calcext:value-type="string">
            <text:p>2025-10-17T13:24:00.724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Product Landing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12-14" calcext:value-type="date">
            <text:p>2025-12-1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8.282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Product Landing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12-14" calcext:value-type="date">
            <text:p>2025-12-1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1-23T07:43:45.132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Product Landing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2-14" calcext:value-type="date">
            <text:p>2025-12-1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2-19T08:08:32.573Z</text:p>
          </table:table-cell>
          <table:table-cell office:value-type="string" calcext:value-type="string">
            <text:p>2026-01-16T08:46:09.563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Product Landing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12-14" calcext:value-type="date">
            <text:p>2025-12-1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6-01-16T07:39:24.862Z</text:p>
          </table:table-cell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Product Landing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12-14" calcext:value-type="date">
            <text:p>2025-12-1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7.860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Product Landing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12-14" calcext:value-type="date">
            <text:p>2025-12-1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1-16T07:57:01.639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Product Landing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12-14" calcext:value-type="date">
            <text:p>2025-12-14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11T15:30:33.394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Technical Documentation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1-30" calcext:value-type="date">
            <text:p>2025-11-30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2-05T08:15:42.568Z</text:p>
          </table:table-cell>
          <table:table-cell office:value-type="string" calcext:value-type="string">
            <text:p>2025-12-05T13:05:34.471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Technical Documentation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11-30" calcext:value-type="date">
            <text:p>2025-11-30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office:value-type="string" calcext:value-type="string">
            <text:p>2025-11-30T14:03:34.690Z</text:p>
          </table:table-cell>
          <table:table-cell office:value-type="string" calcext:value-type="string">
            <text:p>2025-11-30T14:03:34.691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Technical Documentation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11-30" calcext:value-type="date">
            <text:p>2025-11-30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5-10-03T06:48:36.075Z</text:p>
          </table:table-cell>
          <table:table-cell office:value-type="string" calcext:value-type="string">
            <text:p>2025-10-03T06:48:36.076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Technical Documentation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1-30" calcext:value-type="date">
            <text:p>2025-11-30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1-28T07:52:19.172Z</text:p>
          </table:table-cell>
          <table:table-cell office:value-type="string" calcext:value-type="string">
            <text:p>2025-12-05T13:05:15.427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Technical Documentation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1-30" calcext:value-type="date">
            <text:p>2025-11-30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0-24T06:38:41.133Z</text:p>
          </table:table-cell>
          <table:table-cell office:value-type="string" calcext:value-type="string">
            <text:p>2025-12-05T13:06:27.616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Technical Documentation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1-30" calcext:value-type="date">
            <text:p>2025-11-30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1-30T20:34:24.777Z</text:p>
          </table:table-cell>
          <table:table-cell office:value-type="string" calcext:value-type="string">
            <text:p>2025-12-05T13:07:24.728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Technical Documentation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1-30" calcext:value-type="date">
            <text:p>2025-11-30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1-21T07:54:55.405Z</text:p>
          </table:table-cell>
          <table:table-cell office:value-type="string" calcext:value-type="string">
            <text:p>2025-12-05T13:09:24.417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Technical Documentation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1-30" calcext:value-type="date">
            <text:p>2025-11-30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1-14T07:23:35.681Z</text:p>
          </table:table-cell>
          <table:table-cell office:value-type="string" calcext:value-type="string">
            <text:p>2026-01-16T08:41:35.158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Technical Documentation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1-30" calcext:value-type="date">
            <text:p>2025-11-30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1-14T07:45:30.155Z</text:p>
          </table:table-cell>
          <table:table-cell office:value-type="string" calcext:value-type="string">
            <text:p>2025-12-05T13:05:50.183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Technical Documentation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1-30" calcext:value-type="date">
            <text:p>2025-11-30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0-03T08:41:28.095Z</text:p>
          </table:table-cell>
          <table:table-cell office:value-type="string" calcext:value-type="string">
            <text:p>2026-01-16T08:41:05.037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Technical Documentation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1-30" calcext:value-type="date">
            <text:p>2025-11-30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1-21T08:22:10.419Z</text:p>
          </table:table-cell>
          <table:table-cell office:value-type="string" calcext:value-type="string">
            <text:p>2026-01-16T08:40:56.884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Technical Documentation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1-30" calcext:value-type="date">
            <text:p>2025-11-30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6-01-16T07:54:05.372Z</text:p>
          </table:table-cell>
          <table:table-cell office:value-type="string" calcext:value-type="string">
            <text:p>2026-01-16T08:40:41.341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Technical Documentation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1-30" calcext:value-type="date">
            <text:p>2025-11-30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1-14T07:32:07.641Z</text:p>
          </table:table-cell>
          <table:table-cell office:value-type="string" calcext:value-type="string">
            <text:p>2025-12-05T13:07:46.262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Technical Documentation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11-30" calcext:value-type="date">
            <text:p>2025-11-30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6:49:23.466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Technical Documentation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1-30" calcext:value-type="date">
            <text:p>2025-11-30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2-12T08:58:50.799Z</text:p>
          </table:table-cell>
          <table:table-cell office:value-type="string" calcext:value-type="string">
            <text:p>2026-01-16T08:40:25.053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Technical Documentation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11-30" calcext:value-type="date">
            <text:p>2025-11-30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1-23T07:42:58.124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Technical Documentation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1-30" calcext:value-type="date">
            <text:p>2025-11-30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2-19T08:00:09.692Z</text:p>
          </table:table-cell>
          <table:table-cell office:value-type="string" calcext:value-type="string">
            <text:p>2026-01-16T08:41:26.832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Technical Documentation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1-30" calcext:value-type="date">
            <text:p>2025-11-30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6-01-16T08:16:36.099Z</text:p>
          </table:table-cell>
          <table:table-cell office:value-type="string" calcext:value-type="string">
            <text:p>2026-01-16T08:42:01.893Z</text:p>
          </table:table-cell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Technical Documentation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11-30" calcext:value-type="date">
            <text:p>2025-11-30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6:48:44.520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Technical Documentation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1-30" calcext:value-type="date">
            <text:p>2025-11-30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1-14T08:03:47.664Z</text:p>
          </table:table-cell>
          <table:table-cell office:value-type="string" calcext:value-type="string">
            <text:p>2025-12-05T13:06:37.202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Technical Documentation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1-30" calcext:value-type="date">
            <text:p>2025-11-30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1-11T15:01:23.732Z</text:p>
          </table:table-cell>
          <table:table-cell office:value-type="string" calcext:value-type="string">
            <text:p>2026-01-16T08:41:14.658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Tribute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0-31" calcext:value-type="date">
            <text:p>2025-10-3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0-31T08:35:06.840Z</text:p>
          </table:table-cell>
          <table:table-cell office:value-type="string" calcext:value-type="string">
            <text:p>2025-11-07T08:15:14.278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Tribute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10-31" calcext:value-type="date">
            <text:p>2025-10-3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26T07:01:50.758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Tribute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0-31" calcext:value-type="date">
            <text:p>2025-10-3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09-26T07:02:34.055Z</text:p>
          </table:table-cell>
          <table:table-cell office:value-type="string" calcext:value-type="string">
            <text:p>2025-10-03T07:01:48.323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Tribute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0-31" calcext:value-type="date">
            <text:p>2025-10-3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1-14T08:23:42.855Z</text:p>
          </table:table-cell>
          <table:table-cell office:value-type="string" calcext:value-type="string">
            <text:p>2025-11-21T08:05:12.417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Tribute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0-31" calcext:value-type="date">
            <text:p>2025-10-3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0-17T07:22:05.614Z</text:p>
          </table:table-cell>
          <table:table-cell office:value-type="string" calcext:value-type="string">
            <text:p>2025-11-07T08:15:42.075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Tribute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0-31" calcext:value-type="date">
            <text:p>2025-10-3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1-18T09:40:39.928Z</text:p>
          </table:table-cell>
          <table:table-cell office:value-type="string" calcext:value-type="string">
            <text:p>2025-11-21T08:05:56.854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Tribute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0-31" calcext:value-type="date">
            <text:p>2025-10-3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0-17T07:32:32.209Z</text:p>
          </table:table-cell>
          <table:table-cell office:value-type="string" calcext:value-type="string">
            <text:p>2025-11-07T08:16:38.235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Tribute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0-31" calcext:value-type="date">
            <text:p>2025-10-3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1-14T07:23:03.268Z</text:p>
          </table:table-cell>
          <table:table-cell office:value-type="string" calcext:value-type="string">
            <text:p>2025-11-21T08:07:38.932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Tribute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0-31" calcext:value-type="date">
            <text:p>2025-10-3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1-14T07:42:45.032Z</text:p>
          </table:table-cell>
          <table:table-cell office:value-type="string" calcext:value-type="string">
            <text:p>2025-11-21T08:05:36.138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Tribute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0-31" calcext:value-type="date">
            <text:p>2025-10-3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09-26T07:37:01.837Z</text:p>
          </table:table-cell>
          <table:table-cell office:value-type="string" calcext:value-type="string">
            <text:p>2025-10-03T07:02:42.054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Tribute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0-31" calcext:value-type="date">
            <text:p>2025-10-3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1-21T08:12:36.874Z</text:p>
          </table:table-cell>
          <table:table-cell office:value-type="string" calcext:value-type="string">
            <text:p>2025-12-05T13:04:19.302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Tribute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0-31" calcext:value-type="date">
            <text:p>2025-10-3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2-19T08:02:22.756Z</text:p>
          </table:table-cell>
          <table:table-cell office:value-type="string" calcext:value-type="string">
            <text:p>2026-01-16T08:37:19.181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Tribute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0-31" calcext:value-type="date">
            <text:p>2025-10-3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1-14T07:31:37.082Z</text:p>
          </table:table-cell>
          <table:table-cell office:value-type="string" calcext:value-type="string">
            <text:p>2025-11-21T08:07:05.078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Tribute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10-31" calcext:value-type="date">
            <text:p>2025-10-3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26T07:01:19.986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Tribute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0-31" calcext:value-type="date">
            <text:p>2025-10-3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2-19T07:50:18.878Z</text:p>
          </table:table-cell>
          <table:table-cell office:value-type="string" calcext:value-type="string">
            <text:p>2026-01-16T08:37:31.422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Tribute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10-31" calcext:value-type="date">
            <text:p>2025-10-3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1-23T07:44:32.338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Tribute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0-31" calcext:value-type="date">
            <text:p>2025-10-3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1-14T07:57:28.402Z</text:p>
          </table:table-cell>
          <table:table-cell office:value-type="string" calcext:value-type="string">
            <text:p>2025-11-21T08:07:21.098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Tribute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0-31" calcext:value-type="date">
            <text:p>2025-10-3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6-01-16T08:43:28.757Z</text:p>
          </table:table-cell>
          <table:table-cell office:value-type="string" calcext:value-type="string">
            <text:p>2026-01-16T08:44:14.656Z</text:p>
          </table:table-cell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Tribute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10-31" calcext:value-type="date">
            <text:p>2025-10-3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26T07:00:16.613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Tribute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0-31" calcext:value-type="date">
            <text:p>2025-10-3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0-17T07:32:15.285Z</text:p>
          </table:table-cell>
          <table:table-cell office:value-type="string" calcext:value-type="string">
            <text:p>2025-11-07T08:16:27.281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Tribute pag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10-31" calcext:value-type="date">
            <text:p>2025-10-31</text:p>
          </table:table-cell>
          <table:table-cell table:style-name="ce2" office:value-type="string" calcext:value-type="string">
            <text:p>22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0-31T08:10:39.950Z</text:p>
          </table:table-cell>
          <table:table-cell office:value-type="string" calcext:value-type="string">
            <text:p>2025-11-07T08:16:14.899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Survey form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09-28" calcext:value-type="date">
            <text:p>2025-09-28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0-24T07:51:11.562Z</text:p>
          </table:table-cell>
          <table:table-cell office:value-type="string" calcext:value-type="string">
            <text:p>2025-11-07T08:11:31.813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Survey form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09-28" calcext:value-type="date">
            <text:p>2025-09-28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26T07:01:29.564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Survey form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09-28" calcext:value-type="date">
            <text:p>2025-09-28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09-26T07:01:53.488Z</text:p>
          </table:table-cell>
          <table:table-cell office:value-type="string" calcext:value-type="string">
            <text:p>2025-10-03T07:00:28.417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Survey form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09-28" calcext:value-type="date">
            <text:p>2025-09-28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0-03T11:02:40.514Z</text:p>
          </table:table-cell>
          <table:table-cell office:value-type="string" calcext:value-type="string">
            <text:p>2025-11-07T08:10:43.001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Survey form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09-28" calcext:value-type="date">
            <text:p>2025-09-28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0-17T06:40:11.962Z</text:p>
          </table:table-cell>
          <table:table-cell office:value-type="string" calcext:value-type="string">
            <text:p>2025-11-07T08:12:24.827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Survey form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09-28" calcext:value-type="date">
            <text:p>2025-09-28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1-07T08:27:53.393Z</text:p>
          </table:table-cell>
          <table:table-cell office:value-type="string" calcext:value-type="string">
            <text:p>2025-11-21T08:02:48.650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Survey form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09-28" calcext:value-type="date">
            <text:p>2025-09-28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0-03T06:46:21.229Z</text:p>
          </table:table-cell>
          <table:table-cell office:value-type="string" calcext:value-type="string">
            <text:p>2025-10-03T06:59:59.695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Survey form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09-28" calcext:value-type="date">
            <text:p>2025-09-28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1-14T07:22:32.979Z</text:p>
          </table:table-cell>
          <table:table-cell office:value-type="string" calcext:value-type="string">
            <text:p>2025-11-21T08:03:43.840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Survey form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09-28" calcext:value-type="date">
            <text:p>2025-09-28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0-13T10:54:44.467Z</text:p>
          </table:table-cell>
          <table:table-cell office:value-type="string" calcext:value-type="string">
            <text:p>2025-11-07T08:11:46.114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Survey form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09-28" calcext:value-type="date">
            <text:p>2025-09-28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09-26T07:35:46.025Z</text:p>
          </table:table-cell>
          <table:table-cell office:value-type="string" calcext:value-type="string">
            <text:p>2025-10-03T07:01:04.286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Survey form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09-28" calcext:value-type="date">
            <text:p>2025-09-28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1-14T07:57:27.423Z</text:p>
          </table:table-cell>
          <table:table-cell office:value-type="string" calcext:value-type="string">
            <text:p>2025-11-21T08:01:59.096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Survey form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09-28" calcext:value-type="date">
            <text:p>2025-09-28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1-28T08:00:42.648Z</text:p>
          </table:table-cell>
          <table:table-cell office:value-type="string" calcext:value-type="string">
            <text:p>2025-12-05T13:03:14.530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Survey form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09-28" calcext:value-type="date">
            <text:p>2025-09-28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1-07T08:36:37.358Z</text:p>
          </table:table-cell>
          <table:table-cell office:value-type="string" calcext:value-type="string">
            <text:p>2025-11-21T08:03:02.142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Survey form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09-28" calcext:value-type="date">
            <text:p>2025-09-28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26T07:01:22.096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Survey form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09-28" calcext:value-type="date">
            <text:p>2025-09-28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2-19T07:49:49.727Z</text:p>
          </table:table-cell>
          <table:table-cell office:value-type="string" calcext:value-type="string">
            <text:p>2026-01-16T08:35:53.329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Survey form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09-28" calcext:value-type="date">
            <text:p>2025-09-28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1-23T07:45:11.723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Survey form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09-28" calcext:value-type="date">
            <text:p>2025-09-28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1-14T07:56:55.916Z</text:p>
          </table:table-cell>
          <table:table-cell office:value-type="string" calcext:value-type="string">
            <text:p>2025-11-21T08:03:52.227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Survey form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09-28" calcext:value-type="date">
            <text:p>2025-09-28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6-01-16T08:42:11.304Z</text:p>
          </table:table-cell>
          <table:table-cell office:value-type="string" calcext:value-type="string">
            <text:p>2026-01-16T08:45:18.889Z</text:p>
          </table:table-cell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Survey form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5-09-28" calcext:value-type="date">
            <text:p>2025-09-28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5-09-26T07:00:05.318Z</text:p>
          </table:table-cell>
          <table:table-cell office:value-type="string" calcext:value-type="string">
            <text:p>2025-09-26T07:00:05.319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Survey form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09-28" calcext:value-type="date">
            <text:p>2025-09-28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0-03T06:47:12.095Z</text:p>
          </table:table-cell>
          <table:table-cell office:value-type="string" calcext:value-type="string">
            <text:p>2025-10-03T06:59:34.019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Survey form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date" office:date-value="2025-09-28" calcext:value-type="date">
            <text:p>2025-09-28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5-10-31T08:10:00.584Z</text:p>
          </table:table-cell>
          <table:table-cell office:value-type="string" calcext:value-type="string">
            <text:p>2025-11-07T08:12:47.984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Zadání pololetního projektu.</text:p>
          </table:table-cell>
          <table:table-cell office:value-type="float" office:value="816757118265" calcext:value-type="float">
            <text:p>816757118265</text:p>
          </table:table-cell>
          <table:table-cell office:value-type="string" calcext:value-type="string">
            <text:p>Závěrečný projekt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5-10" calcext:value-type="date">
            <text:p>2026-05-10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24T06:42:18.779Z</text:p>
          </table:table-cell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Zadání pololetního projektu.</text:p>
          </table:table-cell>
          <table:table-cell office:value-type="float" office:value="816757118265" calcext:value-type="float">
            <text:p>816757118265</text:p>
          </table:table-cell>
          <table:table-cell office:value-type="string" calcext:value-type="string">
            <text:p>Závěrečný projekt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date" office:date-value="2026-05-10" calcext:value-type="date">
            <text:p>2026-05-10</text:p>
          </table:table-cell>
          <table:table-cell table:style-name="ce2" office:value-type="string" calcext:value-type="string">
            <text:p>21:59:00</text:p>
          </table:table-cell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24T06:42:10.608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Asynchronous Programming by Building an fCC Forum Leaderboard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0.357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Asynchronous Programming by Building an fCC Forum Leaderboard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27.635Z</text:p>
          </table:table-cell>
          <table:table-cell office:value-type="string" calcext:value-type="string">
            <text:p>2025-10-17T13:24:27.636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Asynchronous Programming by Building an fCC Forum Leaderboard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25.480Z</text:p>
          </table:table-cell>
          <table:table-cell office:value-type="string" calcext:value-type="string">
            <text:p>2025-10-17T13:23:25.481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Asynchronous Programming by Building an fCC Forum Leaderboard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13.741Z</text:p>
          </table:table-cell>
          <table:table-cell office:value-type="string" calcext:value-type="string">
            <text:p>2025-10-17T13:23:13.744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Asynchronous Programming by Building an fCC Forum Leaderboard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0.457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Asynchronous Programming by Building an fCC Forum Leaderboard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7.996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Asynchronous Programming by Building an fCC Forum Leaderboard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6.655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Asynchronous Programming by Building an fCC Forum Leaderboard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40.390Z</text:p>
          </table:table-cell>
          <table:table-cell office:value-type="string" calcext:value-type="string">
            <text:p>2025-10-17T13:24:40.391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Asynchronous Programming by Building an fCC Forum Leaderboard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9.987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Asynchronous Programming by Building an fCC Forum Leaderboard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3.032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Asynchronous Programming by Building an fCC Forum Leaderboard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6:17.580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Asynchronous Programming by Building an fCC Forum Leaderboard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9.728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Asynchronous Programming by Building an fCC Forum Leaderboard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52.484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Asynchronous Programming by Building an fCC Forum Leaderboard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1.021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Asynchronous Programming by Building an fCC Forum Leaderboard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17.273Z</text:p>
          </table:table-cell>
          <table:table-cell office:value-type="string" calcext:value-type="string">
            <text:p>2025-10-17T13:24:17.274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Asynchronous Programming by Building an fCC Forum Leaderboard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2.941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Asynchronous Programming by Building an fCC Forum Leaderboard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5:32.540Z</text:p>
          </table:table-cell>
          <table:table-cell office:value-type="string" calcext:value-type="string">
            <text:p>2025-10-17T13:25:32.541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Asynchronous Programming by Building an fCC Forum Leaderboard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Asynchronous Programming by Building an fCC Forum Leaderboard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2.151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Asynchronous Programming by Building an fCC Forum Leaderboard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1.425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Asynchronous Programming by Building an fCC Forum Leaderboard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5.502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Fetch and Promises by Building an fCC Authors Pag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42.090Z</text:p>
          </table:table-cell>
          <table:table-cell office:value-type="string" calcext:value-type="string">
            <text:p>2025-10-17T13:24:42.091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Fetch and Promises by Building an fCC Authors Pag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9.068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Fetch and Promises by Building an fCC Authors Pag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29.570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Fetch and Promises by Building an fCC Authors Pag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2.507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Fetch and Promises by Building an fCC Authors Pag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2.280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Fetch and Promises by Building an fCC Authors Pag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12.962Z</text:p>
          </table:table-cell>
          <table:table-cell office:value-type="string" calcext:value-type="string">
            <text:p>2025-10-17T13:24:12.963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Fetch and Promises by Building an fCC Authors Pag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8.716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Fetch and Promises by Building an fCC Authors Pag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2.021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Fetch and Promises by Building an fCC Authors Pag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9.070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Fetch and Promises by Building an fCC Authors Pag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2-02T02:06:28.169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Fetch and Promises by Building an fCC Authors Pag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6:11.464Z</text:p>
          </table:table-cell>
          <table:table-cell office:value-type="string" calcext:value-type="string">
            <text:p>2025-10-17T13:26:11.466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Fetch and Promises by Building an fCC Authors Pag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7.621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Fetch and Promises by Building an fCC Authors Pag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8.537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Fetch and Promises by Building an fCC Authors Pag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3.441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Fetch and Promises by Building an fCC Authors Pag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5:09.747Z</text:p>
          </table:table-cell>
          <table:table-cell office:value-type="string" calcext:value-type="string">
            <text:p>2025-10-17T13:25:09.748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Fetch and Promises by Building an fCC Authors Pag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03.640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Fetch and Promises by Building an fCC Authors Pag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9.704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Fetch and Promises by Building an fCC Authors Pag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Fetch and Promises by Building an fCC Authors Pag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36.532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Fetch and Promises by Building an fCC Authors Pag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0.219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Fetch and Promises by Building an fCC Authors Pag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6.802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Review Algorithmic Thinking by Building a Dice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9.905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Review Algorithmic Thinking by Building a Dice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7.212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Review Algorithmic Thinking by Building a Dice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29.302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Review Algorithmic Thinking by Building a Dice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1.834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Review Algorithmic Thinking by Building a Dice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3.431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Review Algorithmic Thinking by Building a Dice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4.045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Review Algorithmic Thinking by Building a Dice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8.053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Review Algorithmic Thinking by Building a Dice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0.113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Review Algorithmic Thinking by Building a Dice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4.501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Review Algorithmic Thinking by Building a Dice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1-17T15:18:48.547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Review Algorithmic Thinking by Building a Dice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5:54.283Z</text:p>
          </table:table-cell>
          <table:table-cell office:value-type="string" calcext:value-type="string">
            <text:p>2025-10-17T13:25:54.286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Review Algorithmic Thinking by Building a Dice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20.334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Review Algorithmic Thinking by Building a Dice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6:01.001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Review Algorithmic Thinking by Building a Dice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3.119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Review Algorithmic Thinking by Building a Dice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8.915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Review Algorithmic Thinking by Building a Dice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51.071Z</text:p>
          </table:table-cell>
          <table:table-cell office:value-type="string" calcext:value-type="string">
            <text:p>2025-10-17T13:24:51.072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Review Algorithmic Thinking by Building a Dice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40.186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Review Algorithmic Thinking by Building a Dice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Review Algorithmic Thinking by Building a Dice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8.535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Review Algorithmic Thinking by Building a Dice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9.225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Review Algorithmic Thinking by Building a Dice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6.693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Intermediate OOP by Building a Platformer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7.891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Intermediate OOP by Building a Platformer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56.188Z</text:p>
          </table:table-cell>
          <table:table-cell office:value-type="string" calcext:value-type="string">
            <text:p>2025-10-17T13:24:56.189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Intermediate OOP by Building a Platformer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26.641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Intermediate OOP by Building a Platformer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0.716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Intermediate OOP by Building a Platformer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0.245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Intermediate OOP by Building a Platformer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00.158Z</text:p>
          </table:table-cell>
          <table:table-cell office:value-type="string" calcext:value-type="string">
            <text:p>2025-10-17T13:24:00.160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Intermediate OOP by Building a Platformer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30.150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Intermediate OOP by Building a Platformer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07.246Z</text:p>
          </table:table-cell>
          <table:table-cell office:value-type="string" calcext:value-type="string">
            <text:p>2025-10-17T13:24:07.250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Intermediate OOP by Building a Platformer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52.811Z</text:p>
          </table:table-cell>
          <table:table-cell office:value-type="string" calcext:value-type="string">
            <text:p>2025-10-17T13:23:52.812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Intermediate OOP by Building a Platformer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1-16T10:31:06.549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Intermediate OOP by Building a Platformer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34.796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Intermediate OOP by Building a Platformer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5.869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Intermediate OOP by Building a Platformer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17.074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Intermediate OOP by Building a Platformer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46.766Z</text:p>
          </table:table-cell>
          <table:table-cell office:value-type="string" calcext:value-type="string">
            <text:p>2025-10-17T13:24:46.767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Intermediate OOP by Building a Platformer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6.989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Intermediate OOP by Building a Platformer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14.970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Intermediate OOP by Building a Platformer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6.691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Intermediate OOP by Building a Platformer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Intermediate OOP by Building a Platformer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2.639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Intermediate OOP by Building a Platformer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7.997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Intermediate OOP by Building a Platformer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6.667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Basic OOP by Building a Shopping Car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29.972Z</text:p>
          </table:table-cell>
          <table:table-cell office:value-type="string" calcext:value-type="string">
            <text:p>2025-10-17T13:24:29.975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Basic OOP by Building a Shopping Car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13.847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Basic OOP by Building a Shopping Car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24.411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Basic OOP by Building a Shopping Car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10.028Z</text:p>
          </table:table-cell>
          <table:table-cell office:value-type="string" calcext:value-type="string">
            <text:p>2025-10-17T13:23:10.029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Basic OOP by Building a Shopping Car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6.148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Basic OOP by Building a Shopping Car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20.548Z</text:p>
          </table:table-cell>
          <table:table-cell office:value-type="string" calcext:value-type="string">
            <text:p>2025-10-17T13:24:20.550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Basic OOP by Building a Shopping Car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17.045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Basic OOP by Building a Shopping Car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7.818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Basic OOP by Building a Shopping Car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47.502Z</text:p>
          </table:table-cell>
          <table:table-cell office:value-type="string" calcext:value-type="string">
            <text:p>2025-10-17T13:23:47.503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Basic OOP by Building a Shopping Car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19T15:31:34.687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Basic OOP by Building a Shopping Car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5:27.708Z</text:p>
          </table:table-cell>
          <table:table-cell office:value-type="string" calcext:value-type="string">
            <text:p>2025-10-17T13:25:27.709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Basic OOP by Building a Shopping Car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6.564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Basic OOP by Building a Shopping Car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5:21.202Z</text:p>
          </table:table-cell>
          <table:table-cell office:value-type="string" calcext:value-type="string">
            <text:p>2025-10-17T13:25:21.203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Basic OOP by Building a Shopping Car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47.702Z</text:p>
          </table:table-cell>
          <table:table-cell office:value-type="string" calcext:value-type="string">
            <text:p>2025-10-17T13:24:47.703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Basic OOP by Building a Shopping Car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00.745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Basic OOP by Building a Shopping Car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04.815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Basic OOP by Building a Shopping Car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26.376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Basic OOP by Building a Shopping Car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Basic OOP by Building a Shopping Car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8.130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Basic OOP by Building a Shopping Car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7.051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Basic OOP by Building a Shopping Car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01.351Z</text:p>
          </table:table-cell>
          <table:table-cell office:value-type="string" calcext:value-type="string">
            <text:p>2025-10-17T13:24:01.352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Functional Programming by Building a Spreadshee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5:21.994Z</text:p>
          </table:table-cell>
          <table:table-cell office:value-type="string" calcext:value-type="string">
            <text:p>2025-10-17T13:25:21.995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Functional Programming by Building a Spreadshee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15.534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Functional Programming by Building a Spreadshee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22.363Z</text:p>
          </table:table-cell>
          <table:table-cell office:value-type="string" calcext:value-type="string">
            <text:p>2025-10-17T13:23:22.364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Functional Programming by Building a Spreadshee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09.096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Functional Programming by Building a Spreadshee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4.612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Functional Programming by Building a Spreadshee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00.875Z</text:p>
          </table:table-cell>
          <table:table-cell office:value-type="string" calcext:value-type="string">
            <text:p>2025-10-17T13:24:00.876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Functional Programming by Building a Spreadshee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43.612Z</text:p>
          </table:table-cell>
          <table:table-cell office:value-type="string" calcext:value-type="string">
            <text:p>2025-10-17T13:24:43.613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Functional Programming by Building a Spreadshee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7.256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Functional Programming by Building a Spreadshee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5.986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Functional Programming by Building a Spreadshee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12T09:54:30.809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Functional Programming by Building a Spreadshee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15.892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Functional Programming by Building a Spreadshee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5.954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Functional Programming by Building a Spreadshee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5.506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Functional Programming by Building a Spreadshee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2.954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Functional Programming by Building a Spreadshee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20.301Z</text:p>
          </table:table-cell>
          <table:table-cell office:value-type="string" calcext:value-type="string">
            <text:p>2025-10-17T13:24:20.302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Functional Programming by Building a Spreadshee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54.924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Functional Programming by Building a Spreadshee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29.720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Functional Programming by Building a Spreadshee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Functional Programming by Building a Spreadshee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29.186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Functional Programming by Building a Spreadshee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3.772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Functional Programming by Building a Spreadsheet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5.696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Advanced Array Methods by Building a Statistics Calcul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07.947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Advanced Array Methods by Building a Statistics Calcul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4.361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Advanced Array Methods by Building a Statistics Calcul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9.553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Advanced Array Methods by Building a Statistics Calcul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08.324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Advanced Array Methods by Building a Statistics Calcul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6.836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Advanced Array Methods by Building a Statistics Calcul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6.389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Advanced Array Methods by Building a Statistics Calcul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02.883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Advanced Array Methods by Building a Statistics Calcul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6.041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Advanced Array Methods by Building a Statistics Calcul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8.832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Advanced Array Methods by Building a Statistics Calcul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12T09:54:33.784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Advanced Array Methods by Building a Statistics Calcul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6:12.357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Advanced Array Methods by Building a Statistics Calcul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14.832Z</text:p>
          </table:table-cell>
          <table:table-cell office:value-type="string" calcext:value-type="string">
            <text:p>2025-10-17T13:23:14.833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Advanced Array Methods by Building a Statistics Calcul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05.838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Advanced Array Methods by Building a Statistics Calcul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07.738Z</text:p>
          </table:table-cell>
          <table:table-cell office:value-type="string" calcext:value-type="string">
            <text:p>2025-10-17T13:24:07.742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Advanced Array Methods by Building a Statistics Calcul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9.460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Advanced Array Methods by Building a Statistics Calcul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7.692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Advanced Array Methods by Building a Statistics Calcul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15.494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Advanced Array Methods by Building a Statistics Calcul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Advanced Array Methods by Building a Statistics Calcul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5.247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Advanced Array Methods by Building a Statistics Calcul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6.966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Advanced Array Methods by Building a Statistics Calcul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6.246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Basic Algorithmic Thinking by Building a Number So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4.232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Basic Algorithmic Thinking by Building a Number So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6.879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Basic Algorithmic Thinking by Building a Number So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26.343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Basic Algorithmic Thinking by Building a Number So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07.275Z</text:p>
          </table:table-cell>
          <table:table-cell office:value-type="string" calcext:value-type="string">
            <text:p>2025-10-17T13:23:07.276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Basic Algorithmic Thinking by Building a Number So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51.939Z</text:p>
          </table:table-cell>
          <table:table-cell office:value-type="string" calcext:value-type="string">
            <text:p>2025-10-17T13:24:51.940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Basic Algorithmic Thinking by Building a Number So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7.101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Basic Algorithmic Thinking by Building a Number So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35.485Z</text:p>
          </table:table-cell>
          <table:table-cell office:value-type="string" calcext:value-type="string">
            <text:p>2025-10-17T13:24:35.488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Basic Algorithmic Thinking by Building a Number So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3.156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Basic Algorithmic Thinking by Building a Number So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6.420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Basic Algorithmic Thinking by Building a Number So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12T09:53:53.175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Basic Algorithmic Thinking by Building a Number So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37.430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Basic Algorithmic Thinking by Building a Number So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6.293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Basic Algorithmic Thinking by Building a Number So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38.144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Basic Algorithmic Thinking by Building a Number So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0.776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Basic Algorithmic Thinking by Building a Number So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0.916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Basic Algorithmic Thinking by Building a Number So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5:02.388Z</text:p>
          </table:table-cell>
          <table:table-cell office:value-type="string" calcext:value-type="string">
            <text:p>2025-10-17T13:25:02.389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Basic Algorithmic Thinking by Building a Number So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23.206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Basic Algorithmic Thinking by Building a Number So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Basic Algorithmic Thinking by Building a Number So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33.077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Basic Algorithmic Thinking by Building a Number So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49.898Z</text:p>
          </table:table-cell>
          <table:table-cell office:value-type="string" calcext:value-type="string">
            <text:p>2025-10-17T13:23:49.899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Basic Algorithmic Thinking by Building a Number So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7.399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Regular Expressions by Building a Spam Fil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18.820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Regular Expressions by Building a Spam Fil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07.211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Regular Expressions by Building a Spam Fil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9.171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Regular Expressions by Building a Spam Fil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06.360Z</text:p>
          </table:table-cell>
          <table:table-cell office:value-type="string" calcext:value-type="string">
            <text:p>2025-10-17T13:23:06.361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Regular Expressions by Building a Spam Fil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04.785Z</text:p>
          </table:table-cell>
          <table:table-cell office:value-type="string" calcext:value-type="string">
            <text:p>2025-10-17T13:24:04.786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Regular Expressions by Building a Spam Fil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05.993Z</text:p>
          </table:table-cell>
          <table:table-cell office:value-type="string" calcext:value-type="string">
            <text:p>2025-10-17T13:24:05.994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Regular Expressions by Building a Spam Fil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4.198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Regular Expressions by Building a Spam Fil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2.204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Regular Expressions by Building a Spam Fil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7.945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Regular Expressions by Building a Spam Fil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office:value-type="string" calcext:value-type="string">
            <text:p>2025-12-05T10:43:18.686Z</text:p>
          </table:table-cell>
          <table:table-cell office:value-type="string" calcext:value-type="string">
            <text:p>2025-12-05T10:43:18.687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Regular Expressions by Building a Spam Fil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5:25.571Z</text:p>
          </table:table-cell>
          <table:table-cell office:value-type="string" calcext:value-type="string">
            <text:p>2025-10-17T13:25:25.572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Regular Expressions by Building a Spam Fil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4.558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Regular Expressions by Building a Spam Fil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6:02.618Z</text:p>
          </table:table-cell>
          <table:table-cell office:value-type="string" calcext:value-type="string">
            <text:p>2025-10-17T13:26:02.624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Regular Expressions by Building a Spam Fil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1.253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Regular Expressions by Building a Spam Fil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7.616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Regular Expressions by Building a Spam Fil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0.401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Regular Expressions by Building a Spam Fil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00.174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Regular Expressions by Building a Spam Fil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Regular Expressions by Building a Spam Fil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30.163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Regular Expressions by Building a Spam Fil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9.842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Regular Expressions by Building a Spam Fil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9.128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Recursion by Building a Decimal to Binary Conve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6.772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Recursion by Building a Decimal to Binary Conve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9.635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Recursion by Building a Decimal to Binary Conve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20.124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Recursion by Building a Decimal to Binary Conve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05.571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Recursion by Building a Decimal to Binary Conve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5.090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Recursion by Building a Decimal to Binary Conve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9.424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Recursion by Building a Decimal to Binary Conve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11.481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Recursion by Building a Decimal to Binary Conve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9.862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Recursion by Building a Decimal to Binary Conve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31.502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Recursion by Building a Decimal to Binary Conve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05T10:44:23.747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Recursion by Building a Decimal to Binary Conve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28.525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Recursion by Building a Decimal to Binary Conve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4.419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Recursion by Building a Decimal to Binary Conve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10.770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Recursion by Building a Decimal to Binary Conve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8.650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Recursion by Building a Decimal to Binary Conve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0.890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Recursion by Building a Decimal to Binary Conve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44.612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Recursion by Building a Decimal to Binary Conve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12.366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Recursion by Building a Decimal to Binary Conve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Recursion by Building a Decimal to Binary Conve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35.042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Recursion by Building a Decimal to Binary Conve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1.643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Recursion by Building a Decimal to Binary Conver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47.312Z</text:p>
          </table:table-cell>
          <table:table-cell office:value-type="string" calcext:value-type="string">
            <text:p>2025-10-17T13:23:47.313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localStorage by Building a Todo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6.070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localStorage by Building a Todo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6.413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localStorage by Building a Todo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21.762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localStorage by Building a Todo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04.774Z</text:p>
          </table:table-cell>
          <table:table-cell office:value-type="string" calcext:value-type="string">
            <text:p>2025-10-17T13:23:04.775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localStorage by Building a Todo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1.362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localStorage by Building a Todo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1.767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localStorage by Building a Todo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9.461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localStorage by Building a Todo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4.189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localStorage by Building a Todo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34.862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localStorage by Building a Todo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05T10:41:04.771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localStorage by Building a Todo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6:21.696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localStorage by Building a Todo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13.008Z</text:p>
          </table:table-cell>
          <table:table-cell office:value-type="string" calcext:value-type="string">
            <text:p>2025-10-17T13:23:13.009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localStorage by Building a Todo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47.797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localStorage by Building a Todo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3.293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localStorage by Building a Todo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9.680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localStorage by Building a Todo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7.982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localStorage by Building a Todo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40.049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localStorage by Building a Todo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localStorage by Building a Todo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41.374Z</text:p>
          </table:table-cell>
          <table:table-cell office:value-type="string" calcext:value-type="string">
            <text:p>2025-10-17T13:23:41.375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localStorage by Building a Todo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9.206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localStorage by Building a Todo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1.474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Modern JavaScript Methods by Building Football Team Cards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0.174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Modern JavaScript Methods by Building Football Team Cards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02.601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Modern JavaScript Methods by Building Football Team Cards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22.547Z</text:p>
          </table:table-cell>
          <table:table-cell office:value-type="string" calcext:value-type="string">
            <text:p>2025-10-17T13:23:22.548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Modern JavaScript Methods by Building Football Team Cards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04.011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Modern JavaScript Methods by Building Football Team Cards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3.613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Modern JavaScript Methods by Building Football Team Cards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45.948Z</text:p>
          </table:table-cell>
          <table:table-cell office:value-type="string" calcext:value-type="string">
            <text:p>2025-10-17T13:23:45.949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Modern JavaScript Methods by Building Football Team Cards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59.769Z</text:p>
          </table:table-cell>
          <table:table-cell office:value-type="string" calcext:value-type="string">
            <text:p>2025-10-17T13:24:59.770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Modern JavaScript Methods by Building Football Team Cards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3.922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Modern JavaScript Methods by Building Football Team Cards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52.212Z</text:p>
          </table:table-cell>
          <table:table-cell office:value-type="string" calcext:value-type="string">
            <text:p>2025-10-17T13:23:52.213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Modern JavaScript Methods by Building Football Team Cards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05T10:38:25.918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Modern JavaScript Methods by Building Football Team Cards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19.796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Modern JavaScript Methods by Building Football Team Cards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2.656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Modern JavaScript Methods by Building Football Team Cards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8.868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Modern JavaScript Methods by Building Football Team Cards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2.727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Modern JavaScript Methods by Building Football Team Cards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29.156Z</text:p>
          </table:table-cell>
          <table:table-cell office:value-type="string" calcext:value-type="string">
            <text:p>2025-10-17T13:24:29.157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Modern JavaScript Methods by Building Football Team Cards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23.543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Modern JavaScript Methods by Building Football Team Cards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3.277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Modern JavaScript Methods by Building Football Team Cards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Modern JavaScript Methods by Building Football Team Cards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3.136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Modern JavaScript Methods by Building Football Team Cards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54.025Z</text:p>
          </table:table-cell>
          <table:table-cell office:value-type="string" calcext:value-type="string">
            <text:p>2025-10-17T13:23:54.026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Modern JavaScript Methods by Building Football Team Cards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6.123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the Date Object by Building a Date Format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0.795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the Date Object by Building a Date Format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1.251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the Date Object by Building a Date Format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13.480Z</text:p>
          </table:table-cell>
          <table:table-cell office:value-type="string" calcext:value-type="string">
            <text:p>2025-10-17T13:23:13.481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the Date Object by Building a Date Format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21T08:14:14.341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the Date Object by Building a Date Format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2.564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the Date Object by Building a Date Format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53.113Z</text:p>
          </table:table-cell>
          <table:table-cell office:value-type="string" calcext:value-type="string">
            <text:p>2025-10-17T13:23:53.114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the Date Object by Building a Date Format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08.869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the Date Object by Building a Date Format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32.185Z</text:p>
          </table:table-cell>
          <table:table-cell office:value-type="string" calcext:value-type="string">
            <text:p>2025-10-17T13:24:32.186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the Date Object by Building a Date Format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1.142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the Date Object by Building a Date Format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05T10:37:12.460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the Date Object by Building a Date Format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49.171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the Date Object by Building a Date Format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1.293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the Date Object by Building a Date Format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34.198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the Date Object by Building a Date Format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5.830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the Date Object by Building a Date Format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7.317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the Date Object by Building a Date Format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9.836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the Date Object by Building a Date Format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9.461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the Date Object by Building a Date Format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the Date Object by Building a Date Format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31.428Z</text:p>
          </table:table-cell>
          <table:table-cell office:value-type="string" calcext:value-type="string">
            <text:p>2025-10-17T13:23:31.430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the Date Object by Building a Date Format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6.555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the Date Object by Building a Date Format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40.022Z</text:p>
          </table:table-cell>
          <table:table-cell office:value-type="string" calcext:value-type="string">
            <text:p>2025-10-17T13:23:40.023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Basic String and Array Methods by Building a Music Play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0.599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Basic String and Array Methods by Building a Music Play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7.274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Basic String and Array Methods by Building a Music Play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2.228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Basic String and Array Methods by Building a Music Play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02.237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Basic String and Array Methods by Building a Music Play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5.634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Basic String and Array Methods by Building a Music Play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1.340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Basic String and Array Methods by Building a Music Play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8.163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Basic String and Array Methods by Building a Music Play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0.520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Basic String and Array Methods by Building a Music Play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37.870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Basic String and Array Methods by Building a Music Play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05T10:44:19.873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Basic String and Array Methods by Building a Music Play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42.468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Basic String and Array Methods by Building a Music Play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08.535Z</text:p>
          </table:table-cell>
          <table:table-cell office:value-type="string" calcext:value-type="string">
            <text:p>2025-10-17T13:23:08.536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Basic String and Array Methods by Building a Music Play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6:09.903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Basic String and Array Methods by Building a Music Play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5.827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Basic String and Array Methods by Building a Music Play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9.700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Basic String and Array Methods by Building a Music Play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51.028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Basic String and Array Methods by Building a Music Play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28.758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Basic String and Array Methods by Building a Music Play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Basic String and Array Methods by Building a Music Play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28.527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Basic String and Array Methods by Building a Music Play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2.547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Basic String and Array Methods by Building a Music Play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8.713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Review DOM Manipulation by Building a Rock, <text:s/>Paper, Scissors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30.656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Review DOM Manipulation by Building a Rock, <text:s/>Paper, Scissors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7.144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Review DOM Manipulation by Building a Rock, <text:s/>Paper, Scissors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20.410Z</text:p>
          </table:table-cell>
          <table:table-cell office:value-type="string" calcext:value-type="string">
            <text:p>2025-10-17T13:23:20.411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Review DOM Manipulation by Building a Rock, <text:s/>Paper, Scissors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14T08:12:16.597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Review DOM Manipulation by Building a Rock, <text:s/>Paper, Scissors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29.530Z</text:p>
          </table:table-cell>
          <table:table-cell office:value-type="string" calcext:value-type="string">
            <text:p>2025-10-17T13:24:29.531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Review DOM Manipulation by Building a Rock, <text:s/>Paper, Scissors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1.687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Review DOM Manipulation by Building a Rock, <text:s/>Paper, Scissors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5.160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Review DOM Manipulation by Building a Rock, <text:s/>Paper, Scissors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8.965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Review DOM Manipulation by Building a Rock, <text:s/>Paper, Scissors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37.189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Review DOM Manipulation by Building a Rock, <text:s/>Paper, Scissors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05T10:34:53.007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Review DOM Manipulation by Building a Rock, <text:s/>Paper, Scissors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5:17.406Z</text:p>
          </table:table-cell>
          <table:table-cell office:value-type="string" calcext:value-type="string">
            <text:p>2025-10-17T13:25:17.407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Review DOM Manipulation by Building a Rock, <text:s/>Paper, Scissors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09.244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Review DOM Manipulation by Building a Rock, <text:s/>Paper, Scissors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5:10.536Z</text:p>
          </table:table-cell>
          <table:table-cell office:value-type="string" calcext:value-type="string">
            <text:p>2025-10-17T13:25:10.537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Review DOM Manipulation by Building a Rock, <text:s/>Paper, Scissors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4.610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Review DOM Manipulation by Building a Rock, <text:s/>Paper, Scissors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17.435Z</text:p>
          </table:table-cell>
          <table:table-cell office:value-type="string" calcext:value-type="string">
            <text:p>2025-10-17T13:24:17.436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Review DOM Manipulation by Building a Rock, <text:s/>Paper, Scissors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12.806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Review DOM Manipulation by Building a Rock, <text:s/>Paper, Scissors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4.778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Review DOM Manipulation by Building a Rock, <text:s/>Paper, Scissors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Review DOM Manipulation by Building a Rock, <text:s/>Paper, Scissors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39.365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Review DOM Manipulation by Building a Rock, <text:s/>Paper, Scissors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35.381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Review DOM Manipulation by Building a Rock, <text:s/>Paper, Scissors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1.930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Form Validation by Building a Calorie Coun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5:22.804Z</text:p>
          </table:table-cell>
          <table:table-cell office:value-type="string" calcext:value-type="string">
            <text:p>2025-10-17T13:25:22.805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Form Validation by Building a Calorie Coun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9.167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Form Validation by Building a Calorie Coun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11.790Z</text:p>
          </table:table-cell>
          <table:table-cell office:value-type="string" calcext:value-type="string">
            <text:p>2025-10-17T13:23:11.791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Form Validation by Building a Calorie Coun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01.036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Form Validation by Building a Calorie Coun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7.903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Form Validation by Building a Calorie Coun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3.507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Form Validation by Building a Calorie Coun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9.916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Form Validation by Building a Calorie Coun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5.658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Form Validation by Building a Calorie Coun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1.070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Form Validation by Building a Calorie Coun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05T10:33:05.185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Form Validation by Building a Calorie Coun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9.553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Form Validation by Building a Calorie Coun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08.995Z</text:p>
          </table:table-cell>
          <table:table-cell office:value-type="string" calcext:value-type="string">
            <text:p>2025-10-17T13:23:08.996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Form Validation by Building a Calorie Coun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5:23.596Z</text:p>
          </table:table-cell>
          <table:table-cell office:value-type="string" calcext:value-type="string">
            <text:p>2025-10-17T13:25:23.598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Form Validation by Building a Calorie Coun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17.101Z</text:p>
          </table:table-cell>
          <table:table-cell office:value-type="string" calcext:value-type="string">
            <text:p>2025-10-17T13:24:17.102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Form Validation by Building a Calorie Coun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4.994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Form Validation by Building a Calorie Coun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43.872Z</text:p>
          </table:table-cell>
          <table:table-cell office:value-type="string" calcext:value-type="string">
            <text:p>2025-10-17T13:24:43.873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Form Validation by Building a Calorie Coun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16.950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Form Validation by Building a Calorie Coun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Form Validation by Building a Calorie Coun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32.217Z</text:p>
          </table:table-cell>
          <table:table-cell office:value-type="string" calcext:value-type="string">
            <text:p>2025-10-17T13:23:32.220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Form Validation by Building a Calorie Coun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36.681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Form Validation by Building a Calorie Count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57.038Z</text:p>
          </table:table-cell>
          <table:table-cell office:value-type="string" calcext:value-type="string">
            <text:p>2025-10-17T13:23:57.041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Basic Debugging by Building a Random Background Color Chang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5.952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Basic Debugging by Building a Random Background Color Chang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13.393Z</text:p>
          </table:table-cell>
          <table:table-cell office:value-type="string" calcext:value-type="string">
            <text:p>2025-10-17T13:24:13.394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Basic Debugging by Building a Random Background Color Chang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4.921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Basic Debugging by Building a Random Background Color Chang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07T07:59:41.557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Basic Debugging by Building a Random Background Color Chang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1.142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Basic Debugging by Building a Random Background Color Chang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2.694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Basic Debugging by Building a Random Background Color Chang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13.203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Basic Debugging by Building a Random Background Color Chang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0.064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Basic Debugging by Building a Random Background Color Chang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38.810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Basic Debugging by Building a Random Background Color Chang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05T10:31:20.771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Basic Debugging by Building a Random Background Color Chang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09.472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Basic Debugging by Building a Random Background Color Chang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06.707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Basic Debugging by Building a Random Background Color Chang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10.069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Basic Debugging by Building a Random Background Color Chang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0.639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Basic Debugging by Building a Random Background Color Chang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6.586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Basic Debugging by Building a Random Background Color Chang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39.010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Basic Debugging by Building a Random Background Color Chang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01.161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Basic Debugging by Building a Random Background Color Chang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Basic Debugging by Building a Random Background Color Chang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23.926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Basic Debugging by Building a Random Background Color Chang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9.890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Basic Debugging by Building a Random Background Color Change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5.522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Basic JavaScript by Building a Role Playing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1.487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Basic JavaScript by Building a Role Playing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6.638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Basic JavaScript by Building a Role Playing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13.404Z</text:p>
          </table:table-cell>
          <table:table-cell office:value-type="string" calcext:value-type="string">
            <text:p>2025-10-17T13:23:13.405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Basic JavaScript by Building a Role Playing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2:59.367Z</text:p>
          </table:table-cell>
          <table:table-cell office:value-type="string" calcext:value-type="string">
            <text:p>2025-10-17T13:22:59.368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Basic JavaScript by Building a Role Playing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8.848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Basic JavaScript by Building a Role Playing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1.797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Basic JavaScript by Building a Role Playing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01.488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Basic JavaScript by Building a Role Playing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10.845Z</text:p>
          </table:table-cell>
          <table:table-cell office:value-type="string" calcext:value-type="string">
            <text:p>2025-10-17T13:24:10.846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Basic JavaScript by Building a Role Playing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31.803Z</text:p>
          </table:table-cell>
          <table:table-cell office:value-type="string" calcext:value-type="string">
            <text:p>2025-10-17T13:23:31.804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Basic JavaScript by Building a Role Playing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05T10:44:15.510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Basic JavaScript by Building a Role Playing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5:26.531Z</text:p>
          </table:table-cell>
          <table:table-cell office:value-type="string" calcext:value-type="string">
            <text:p>2025-10-17T13:25:26.532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Basic JavaScript by Building a Role Playing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04.886Z</text:p>
          </table:table-cell>
          <table:table-cell office:value-type="string" calcext:value-type="string">
            <text:p>2025-10-17T13:23:04.887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Basic JavaScript by Building a Role Playing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4.532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Basic JavaScript by Building a Role Playing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58.538Z</text:p>
          </table:table-cell>
          <table:table-cell office:value-type="string" calcext:value-type="string">
            <text:p>2025-10-17T13:23:58.539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Basic JavaScript by Building a Role Playing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9.334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Basic JavaScript by Building a Role Playing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24.442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Basic JavaScript by Building a Role Playing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20.544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Basic JavaScript by Building a Role Playing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Basic JavaScript by Building a Role Playing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36.941Z</text:p>
          </table:table-cell>
          <table:table-cell office:value-type="string" calcext:value-type="string">
            <text:p>2025-10-17T13:23:36.942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Basic JavaScript by Building a Role Playing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53.202Z</text:p>
          </table:table-cell>
          <table:table-cell office:value-type="string" calcext:value-type="string">
            <text:p>2025-10-17T13:23:53.203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Basic JavaScript by Building a Role Playing Gam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4.583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Review JavaScript Fundamentals by Building a Gradebook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26.410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Review JavaScript Fundamentals by Building a Gradebook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2.642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Review JavaScript Fundamentals by Building a Gradebook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09.985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Review JavaScript Fundamentals by Building a Gradebook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07T08:28:07.912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Review JavaScript Fundamentals by Building a Gradebook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4.364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Review JavaScript Fundamentals by Building a Gradebook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4.405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Review JavaScript Fundamentals by Building a Gradebook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6.366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Review JavaScript Fundamentals by Building a Gradebook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07.642Z</text:p>
          </table:table-cell>
          <table:table-cell office:value-type="string" calcext:value-type="string">
            <text:p>2025-10-17T13:24:07.643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Review JavaScript Fundamentals by Building a Gradebook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4.851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Review JavaScript Fundamentals by Building a Gradebook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05T10:29:04.573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Review JavaScript Fundamentals by Building a Gradebook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2.346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Review JavaScript Fundamentals by Building a Gradebook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03.829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Review JavaScript Fundamentals by Building a Gradebook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19.540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Review JavaScript Fundamentals by Building a Gradebook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0.265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Review JavaScript Fundamentals by Building a Gradebook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58.398Z</text:p>
          </table:table-cell>
          <table:table-cell office:value-type="string" calcext:value-type="string">
            <text:p>2025-10-17T13:24:58.399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Review JavaScript Fundamentals by Building a Gradebook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48.011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Review JavaScript Fundamentals by Building a Gradebook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47.608Z</text:p>
          </table:table-cell>
          <table:table-cell office:value-type="string" calcext:value-type="string">
            <text:p>2025-10-17T13:24:47.610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Review JavaScript Fundamentals by Building a Gradebook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Review JavaScript Fundamentals by Building a Gradebook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23.408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Review JavaScript Fundamentals by Building a Gradebook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36.845Z</text:p>
          </table:table-cell>
          <table:table-cell office:value-type="string" calcext:value-type="string">
            <text:p>2025-10-17T13:23:36.846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Review JavaScript Fundamentals by Building a Gradebook App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48.501Z</text:p>
          </table:table-cell>
          <table:table-cell office:value-type="string" calcext:value-type="string">
            <text:p>2025-10-17T13:23:48.507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Introductory JavaScript by Building a Pyramid Gener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8.197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Introductory JavaScript by Building a Pyramid Gener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3.072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Introductory JavaScript by Building a Pyramid Gener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0-24T06:51:29.575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Introductory JavaScript by Building a Pyramid Gener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0-31T08:33:17.412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Introductory JavaScript by Building a Pyramid Gener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2.970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Introductory JavaScript by Building a Pyramid Gener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03.282Z</text:p>
          </table:table-cell>
          <table:table-cell office:value-type="string" calcext:value-type="string">
            <text:p>2025-10-17T13:24:03.285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Introductory JavaScript by Building a Pyramid Gener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5.618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Introductory JavaScript by Building a Pyramid Gener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1.830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Introductory JavaScript by Building a Pyramid Gener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36.209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Introductory JavaScript by Building a Pyramid Gener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office:value-type="string" calcext:value-type="string">
            <text:p>2025-12-05T10:26:48.761Z</text:p>
          </table:table-cell>
          <table:table-cell office:value-type="string" calcext:value-type="string">
            <text:p>2025-12-05T10:26:48.762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Introductory JavaScript by Building a Pyramid Gener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42.639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Introductory JavaScript by Building a Pyramid Gener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04.612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Introductory JavaScript by Building a Pyramid Gener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26.219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Introductory JavaScript by Building a Pyramid Gener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1.312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Introductory JavaScript by Building a Pyramid Gener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6.868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Introductory JavaScript by Building a Pyramid Gener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5:12.014Z</text:p>
          </table:table-cell>
          <table:table-cell office:value-type="string" calcext:value-type="string">
            <text:p>2025-10-17T13:25:12.015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Introductory JavaScript by Building a Pyramid Gener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7.592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Introductory JavaScript by Building a Pyramid Gener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Introductory JavaScript by Building a Pyramid Gener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33.921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Introductory JavaScript by Building a Pyramid Gener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37.568Z</text:p>
          </table:table-cell>
          <table:table-cell office:value-type="string" calcext:value-type="string">
            <text:p>2025-10-17T13:23:37.569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Introductory JavaScript by Building a Pyramid Generator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8.028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CSS Transforms by Building a Penguin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38.498Z</text:p>
          </table:table-cell>
          <table:table-cell office:value-type="string" calcext:value-type="string">
            <text:p>2025-10-17T13:24:38.499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CSS Transforms by Building a Penguin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5.240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CSS Transforms by Building a Penguin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3.811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CSS Transforms by Building a Penguin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2:55.517Z</text:p>
          </table:table-cell>
          <table:table-cell office:value-type="string" calcext:value-type="string">
            <text:p>2025-10-17T13:22:55.519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CSS Transforms by Building a Penguin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59.629Z</text:p>
          </table:table-cell>
          <table:table-cell office:value-type="string" calcext:value-type="string">
            <text:p>2025-10-17T13:23:59.630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CSS Transforms by Building a Penguin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3.329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CSS Transforms by Building a Penguin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24.841Z</text:p>
          </table:table-cell>
          <table:table-cell office:value-type="string" calcext:value-type="string">
            <text:p>2025-10-17T13:24:24.842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CSS Transforms by Building a Penguin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1.917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CSS Transforms by Building a Penguin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3.668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CSS Transforms by Building a Penguin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05T10:21:17.997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CSS Transforms by Building a Penguin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4.192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CSS Transforms by Building a Penguin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04.607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CSS Transforms by Building a Penguin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5:51.769Z</text:p>
          </table:table-cell>
          <table:table-cell office:value-type="string" calcext:value-type="string">
            <text:p>2025-10-17T13:25:51.770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CSS Transforms by Building a Penguin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1.052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CSS Transforms by Building a Penguin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47.228Z</text:p>
          </table:table-cell>
          <table:table-cell office:value-type="string" calcext:value-type="string">
            <text:p>2025-10-17T13:24:47.229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CSS Transforms by Building a Penguin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21.246Z</text:p>
          </table:table-cell>
          <table:table-cell office:value-type="string" calcext:value-type="string">
            <text:p>2025-10-17T13:24:21.247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CSS Transforms by Building a Penguin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17.888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CSS Transforms by Building a Penguin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CSS Transforms by Building a Penguin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33.498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CSS Transforms by Building a Penguin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8.205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CSS Transforms by Building a Penguin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9.791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CSS Animation by Building a Ferris Whe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14.466Z</text:p>
          </table:table-cell>
          <table:table-cell office:value-type="string" calcext:value-type="string">
            <text:p>2025-10-17T13:24:14.469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CSS Animation by Building a Ferris Whe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9.779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CSS Animation by Building a Ferris Whe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1.780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CSS Animation by Building a Ferris Whe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2:54.607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CSS Animation by Building a Ferris Whe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3.468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CSS Animation by Building a Ferris Whe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12T08:48:42.024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CSS Animation by Building a Ferris Whe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12T08:26:26.849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CSS Animation by Building a Ferris Whe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08.713Z</text:p>
          </table:table-cell>
          <table:table-cell office:value-type="string" calcext:value-type="string">
            <text:p>2025-10-17T13:24:08.714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CSS Animation by Building a Ferris Whe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26.721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CSS Animation by Building a Ferris Whe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office:value-type="string" calcext:value-type="string">
            <text:p>2025-12-05T10:21:05.108Z</text:p>
          </table:table-cell>
          <table:table-cell office:value-type="string" calcext:value-type="string">
            <text:p>2025-12-05T10:21:11.391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CSS Animation by Building a Ferris Whe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50.066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CSS Animation by Building a Ferris Whe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03.343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CSS Animation by Building a Ferris Whe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07.198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CSS Animation by Building a Ferris Whe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28.020Z</text:p>
          </table:table-cell>
          <table:table-cell office:value-type="string" calcext:value-type="string">
            <text:p>2025-10-17T13:24:28.021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CSS Animation by Building a Ferris Whe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9.073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CSS Animation by Building a Ferris Whe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20.874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CSS Animation by Building a Ferris Whe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36.295Z</text:p>
          </table:table-cell>
          <table:table-cell office:value-type="string" calcext:value-type="string">
            <text:p>2025-10-17T13:24:36.296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CSS Animation by Building a Ferris Whe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CSS Animation by Building a Ferris Whe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7.335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CSS Animation by Building a Ferris Whe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52.983Z</text:p>
          </table:table-cell>
          <table:table-cell office:value-type="string" calcext:value-type="string">
            <text:p>2025-10-17T13:23:52.984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CSS Animation by Building a Ferris Whe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37.488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CSS Grid by Building a Magaz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4.932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CSS Grid by Building a Magaz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6.557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CSS Grid by Building a Magaz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06.060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CSS Grid by Building a Magaz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2:53.332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CSS Grid by Building a Magaz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0.580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CSS Grid by Building a Magaz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4.912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CSS Grid by Building a Magaz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05T08:46:08.535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CSS Grid by Building a Magaz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6.858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CSS Grid by Building a Magaz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24.225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CSS Grid by Building a Magaz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05T10:20:58.991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CSS Grid by Building a Magaz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50.161Z</text:p>
          </table:table-cell>
          <table:table-cell office:value-type="string" calcext:value-type="string">
            <text:p>2025-10-17T13:24:50.162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CSS Grid by Building a Magaz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2:58.534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CSS Grid by Building a Magaz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15.064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CSS Grid by Building a Magaz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0.509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CSS Grid by Building a Magaz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2.664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CSS Grid by Building a Magaz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43.205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CSS Grid by Building a Magaz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19.311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CSS Grid by Building a Magaz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CSS Grid by Building a Magaz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8.685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CSS Grid by Building a Magaz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0.643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CSS Grid by Building a Magaz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31.316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CSS Variables by Building a City Skyl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11.246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CSS Variables by Building a City Skyl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3.242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CSS Variables by Building a City Skyl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08.289Z</text:p>
          </table:table-cell>
          <table:table-cell office:value-type="string" calcext:value-type="string">
            <text:p>2025-10-17T13:23:08.290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CSS Variables by Building a City Skyl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2:52.285Z</text:p>
          </table:table-cell>
          <table:table-cell office:value-type="string" calcext:value-type="string">
            <text:p>2025-10-17T13:22:52.286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CSS Variables by Building a City Skyl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1.630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CSS Variables by Building a City Skyl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9.382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CSS Variables by Building a City Skyl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0.946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CSS Variables by Building a City Skyl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7.132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CSS Variables by Building a City Skyl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8.659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CSS Variables by Building a City Skyl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05T10:20:54.799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CSS Variables by Building a City Skyl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6:08.985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CSS Variables by Building a City Skyl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01.594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CSS Variables by Building a City Skyl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5:35.741Z</text:p>
          </table:table-cell>
          <table:table-cell office:value-type="string" calcext:value-type="string">
            <text:p>2025-10-17T13:25:35.742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CSS Variables by Building a City Skyl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9.993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CSS Variables by Building a City Skyl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7.911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CSS Variables by Building a City Skyl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5:35.652Z</text:p>
          </table:table-cell>
          <table:table-cell office:value-type="string" calcext:value-type="string">
            <text:p>2025-10-17T13:25:35.653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CSS Variables by Building a City Skyl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7.344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CSS Variables by Building a City Skyl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CSS Variables by Building a City Skyl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6.847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CSS Variables by Building a City Skyl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34.724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CSS Variables by Building a City Skyline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29.015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Intermediate CSS by Building a Cat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11.868Z</text:p>
          </table:table-cell>
          <table:table-cell office:value-type="string" calcext:value-type="string">
            <text:p>2025-10-17T13:24:11.869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Intermediate CSS by Building a Cat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6.508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Intermediate CSS by Building a Cat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02.718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Intermediate CSS by Building a Cat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2:51.521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Intermediate CSS by Building a Cat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3.499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Intermediate CSS by Building a Cat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41.603Z</text:p>
          </table:table-cell>
          <table:table-cell office:value-type="string" calcext:value-type="string">
            <text:p>2025-10-17T13:23:41.607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Intermediate CSS by Building a Cat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21T07:45:17.768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Intermediate CSS by Building a Cat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0.326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Intermediate CSS by Building a Cat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37.053Z</text:p>
          </table:table-cell>
          <table:table-cell office:value-type="string" calcext:value-type="string">
            <text:p>2025-10-17T13:23:37.054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Intermediate CSS by Building a Cat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office:value-type="string" calcext:value-type="string">
            <text:p>2025-12-05T10:20:50.167Z</text:p>
          </table:table-cell>
          <table:table-cell office:value-type="string" calcext:value-type="string">
            <text:p>2025-12-05T10:20:50.168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Intermediate CSS by Building a Cat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1.442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Intermediate CSS by Building a Cat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2:58.064Z</text:p>
          </table:table-cell>
          <table:table-cell office:value-type="string" calcext:value-type="string">
            <text:p>2025-10-17T13:22:58.065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Intermediate CSS by Building a Cat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1.982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Intermediate CSS by Building a Cat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6.651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Intermediate CSS by Building a Cat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8.029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Intermediate CSS by Building a Cat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8.026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Intermediate CSS by Building a Cat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4.333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Intermediate CSS by Building a Cat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Intermediate CSS by Building a Cat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20.486Z</text:p>
          </table:table-cell>
          <table:table-cell office:value-type="string" calcext:value-type="string">
            <text:p>2025-10-17T13:23:20.487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Intermediate CSS by Building a Cat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28.173Z</text:p>
          </table:table-cell>
          <table:table-cell office:value-type="string" calcext:value-type="string">
            <text:p>2025-10-17T13:23:28.174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Intermediate CSS by Building a Cat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4.093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More About CSS Pseudo Selectors by Building A Balance Sheet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16.008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More About CSS Pseudo Selectors by Building A Balance Sheet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8.594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More About CSS Pseudo Selectors by Building A Balance Sheet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04.648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More About CSS Pseudo Selectors by Building A Balance Sheet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2:50.640Z</text:p>
          </table:table-cell>
          <table:table-cell office:value-type="string" calcext:value-type="string">
            <text:p>2025-10-17T13:22:50.642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More About CSS Pseudo Selectors by Building A Balance Sheet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5.262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More About CSS Pseudo Selectors by Building A Balance Sheet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43.674Z</text:p>
          </table:table-cell>
          <table:table-cell office:value-type="string" calcext:value-type="string">
            <text:p>2025-10-17T13:23:43.675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More About CSS Pseudo Selectors by Building A Balance Sheet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03.554Z</text:p>
          </table:table-cell>
          <table:table-cell office:value-type="string" calcext:value-type="string">
            <text:p>2025-10-17T13:24:03.555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More About CSS Pseudo Selectors by Building A Balance Sheet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8.171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More About CSS Pseudo Selectors by Building A Balance Sheet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7.349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More About CSS Pseudo Selectors by Building A Balance Sheet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05T10:20:45.975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More About CSS Pseudo Selectors by Building A Balance Sheet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6:05.008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More About CSS Pseudo Selectors by Building A Balance Sheet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2:58.294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More About CSS Pseudo Selectors by Building A Balance Sheet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8.242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More About CSS Pseudo Selectors by Building A Balance Sheet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5.385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More About CSS Pseudo Selectors by Building A Balance Sheet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7.351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More About CSS Pseudo Selectors by Building A Balance Sheet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25.682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More About CSS Pseudo Selectors by Building A Balance Sheet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51.716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More About CSS Pseudo Selectors by Building A Balance Sheet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More About CSS Pseudo Selectors by Building A Balance Sheet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26.978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More About CSS Pseudo Selectors by Building A Balance Sheet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5.771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More About CSS Pseudo Selectors by Building A Balance Sheet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57.762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Accessibility by Building a Quiz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3.828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Accessibility by Building a Quiz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0.585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Accessibility by Building a Quiz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01.308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Accessibility by Building a Quiz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2:49.973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Accessibility by Building a Quiz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8.032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Accessibility by Building a Quiz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30.920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Accessibility by Building a Quiz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4.722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Accessibility by Building a Quiz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49.499Z</text:p>
          </table:table-cell>
          <table:table-cell office:value-type="string" calcext:value-type="string">
            <text:p>2025-10-17T13:23:49.500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Accessibility by Building a Quiz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7.448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Accessibility by Building a Quiz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05T10:20:42.055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Accessibility by Building a Quiz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44.021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Accessibility by Building a Quiz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2:57.260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Accessibility by Building a Quiz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5:52.987Z</text:p>
          </table:table-cell>
          <table:table-cell office:value-type="string" calcext:value-type="string">
            <text:p>2025-10-17T13:25:52.988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Accessibility by Building a Quiz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55.776Z</text:p>
          </table:table-cell>
          <table:table-cell office:value-type="string" calcext:value-type="string">
            <text:p>2025-10-17T13:23:55.777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Accessibility by Building a Quiz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7.935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Accessibility by Building a Quiz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7.810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Accessibility by Building a Quiz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5.832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Accessibility by Building a Quiz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Accessibility by Building a Quiz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16.558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Accessibility by Building a Quiz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28.794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Accessibility by Building a Quiz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6.666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Typography by Building a Nutrition Lab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38.283Z</text:p>
          </table:table-cell>
          <table:table-cell office:value-type="string" calcext:value-type="string">
            <text:p>2025-10-17T13:24:38.284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Typography by Building a Nutrition Lab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8.269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Typography by Building a Nutrition Lab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06.325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Typography by Building a Nutrition Lab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2:49.054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Typography by Building a Nutrition Lab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2.373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Typography by Building a Nutrition Lab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3.930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Typography by Building a Nutrition Lab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03.520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Typography by Building a Nutrition Lab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2.192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Typography by Building a Nutrition Lab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33.742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Typography by Building a Nutrition Lab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05T10:20:35.833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Typography by Building a Nutrition Lab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46.292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Typography by Building a Nutrition Lab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2:54.978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Typography by Building a Nutrition Lab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57.177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Typography by Building a Nutrition Lab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1.250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Typography by Building a Nutrition Lab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1.698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Typography by Building a Nutrition Lab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34.945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Typography by Building a Nutrition Lab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27.977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Typography by Building a Nutrition Lab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Typography by Building a Nutrition Lab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26.770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Typography by Building a Nutrition Lab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31.597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Typography by Building a Nutrition Label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57.590Z</text:p>
          </table:table-cell>
          <table:table-cell office:value-type="string" calcext:value-type="string">
            <text:p>2025-10-17T13:23:57.602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CSS Flexbox by Building a Photo Gallery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30.946Z</text:p>
          </table:table-cell>
          <table:table-cell office:value-type="string" calcext:value-type="string">
            <text:p>2025-10-17T13:24:30.947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CSS Flexbox by Building a Photo Gallery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2.806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CSS Flexbox by Building a Photo Gallery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00.380Z</text:p>
          </table:table-cell>
          <table:table-cell office:value-type="string" calcext:value-type="string">
            <text:p>2025-10-17T13:23:00.381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CSS Flexbox by Building a Photo Gallery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2:48.336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CSS Flexbox by Building a Photo Gallery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8.736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CSS Flexbox by Building a Photo Gallery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38.219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CSS Flexbox by Building a Photo Gallery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0.499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CSS Flexbox by Building a Photo Gallery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36.465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CSS Flexbox by Building a Photo Gallery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27.042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CSS Flexbox by Building a Photo Gallery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05T10:20:30.018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CSS Flexbox by Building a Photo Gallery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19.717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CSS Flexbox by Building a Photo Gallery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05T08:50:36.637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CSS Flexbox by Building a Photo Gallery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34.952Z</text:p>
          </table:table-cell>
          <table:table-cell office:value-type="string" calcext:value-type="string">
            <text:p>2025-10-17T13:24:34.953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CSS Flexbox by Building a Photo Gallery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4.107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CSS Flexbox by Building a Photo Gallery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2-13T08:56:13.812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CSS Flexbox by Building a Photo Gallery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48.160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CSS Flexbox by Building a Photo Gallery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1.995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CSS Flexbox by Building a Photo Gallery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CSS Flexbox by Building a Photo Gallery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22.843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CSS Flexbox by Building a Photo Gallery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24.313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CSS Flexbox by Building a Photo Gallery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43.787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HTML Forms by Building a Registration Form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14.941Z</text:p>
          </table:table-cell>
          <table:table-cell office:value-type="string" calcext:value-type="string">
            <text:p>2025-10-17T13:24:14.942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HTML Forms by Building a Registration Form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27.094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HTML Forms by Building a Registration Form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07.092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HTML Forms by Building a Registration Form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2:47.650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HTML Forms by Building a Registration Form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1.441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HTML Forms by Building a Registration Form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office:value-type="string" calcext:value-type="string">
            <text:p>2025-11-07T08:18:07.792Z</text:p>
          </table:table-cell>
          <table:table-cell office:value-type="string" calcext:value-type="string">
            <text:p>2025-11-07T08:18:07.793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HTML Forms by Building a Registration Form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36.923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HTML Forms by Building a Registration Form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14.983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HTML Forms by Building a Registration Form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26.872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HTML Forms by Building a Registration Form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05T10:20:24.442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HTML Forms by Building a Registration Form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16.489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HTML Forms by Building a Registration Form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2:55.852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HTML Forms by Building a Registration Form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51.100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HTML Forms by Building a Registration Form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15.109Z</text:p>
          </table:table-cell>
          <table:table-cell office:value-type="string" calcext:value-type="string">
            <text:p>2025-10-17T13:24:15.110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HTML Forms by Building a Registration Form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4:08.182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HTML Forms by Building a Registration Form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5:32.164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HTML Forms by Building a Registration Form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4:20.743Z</text:p>
          </table:table-cell>
          <table:table-cell office:value-type="string" calcext:value-type="string">
            <text:p>2025-10-17T13:24:20.744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HTML Forms by Building a Registration Form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HTML Forms by Building a Registration Form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24.008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HTML Forms by Building a Registration Form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13:23:36.794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HTML Forms by Building a Registration Form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13:23:38.954Z</text:p>
          </table:table-cell>
          <table:table-cell office:value-type="string" calcext:value-type="string">
            <text:p>2025-10-17T13:23:38.955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Responsive Web Design by Building a Piano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07:34:26.762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Responsive Web Design by Building a Piano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07:33:30.215Z</text:p>
          </table:table-cell>
          <table:table-cell office:value-type="string" calcext:value-type="string">
            <text:p>2025-10-17T07:33:30.216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Responsive Web Design by Building a Piano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07:32:31.353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Responsive Web Design by Building a Piano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07:32:18.277Z</text:p>
          </table:table-cell>
          <table:table-cell office:value-type="string" calcext:value-type="string">
            <text:p>2025-10-17T07:32:18.278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Responsive Web Design by Building a Piano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07:33:45.962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Responsive Web Design by Building a Piano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07:33:03.689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Responsive Web Design by Building a Piano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office:value-type="string" calcext:value-type="string">
            <text:p>2025-10-17T07:33:23.233Z</text:p>
          </table:table-cell>
          <table:table-cell office:value-type="string" calcext:value-type="string">
            <text:p>2025-10-17T07:33:23.234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Responsive Web Design by Building a Piano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07:33:35.428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Responsive Web Design by Building a Piano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07:33:05.598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Responsive Web Design by Building a Piano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05T10:20:19.874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Responsive Web Design by Building a Piano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07:34:25.294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Responsive Web Design by Building a Piano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07:32:25.354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Responsive Web Design by Building a Piano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07:35:16.891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Responsive Web Design by Building a Piano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07:33:44.710Z</text:p>
          </table:table-cell>
          <table:table-cell office:value-type="string" calcext:value-type="string">
            <text:p>2025-10-17T07:33:44.711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Responsive Web Design by Building a Piano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2-06T08:25:03.343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Responsive Web Design by Building a Piano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07:34:09.769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Responsive Web Design by Building a Piano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07:34:22.917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Responsive Web Design by Building a Piano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Responsive Web Design by Building a Piano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07:32:55.175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Responsive Web Design by Building a Piano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office:value-type="string" calcext:value-type="string">
            <text:p>2025-10-17T07:32:51.237Z</text:p>
          </table:table-cell>
          <table:table-cell office:value-type="string" calcext:value-type="string">
            <text:p>2025-10-17T07:32:51.238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Responsive Web Design by Building a Piano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07:33:07.692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Wordle</text:p>
          </table:table-cell>
          <table:table-cell office:value-type="float" office:value="810815105769" calcext:value-type="float">
            <text:p>810815105769</text:p>
          </table:table-cell>
          <table:table-cell office:value-type="string" calcext:value-type="string">
            <text:p>Pokročilá témata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17T06:56:02.874Z</text:p>
          </table:table-cell>
          <table:table-cell office:value-type="string" calcext:value-type="string">
            <text:p>2025-10-17T06:56:02.875Z</text:p>
          </table:table-cell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Wordle</text:p>
          </table:table-cell>
          <table:table-cell office:value-type="float" office:value="810815105769" calcext:value-type="float">
            <text:p>810815105769</text:p>
          </table:table-cell>
          <table:table-cell office:value-type="string" calcext:value-type="string">
            <text:p>Pokročilá témata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6:44:09.293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TODO aplikace</text:p>
          </table:table-cell>
          <table:table-cell office:value-type="float" office:value="810815105769" calcext:value-type="float">
            <text:p>810815105769</text:p>
          </table:table-cell>
          <table:table-cell office:value-type="string" calcext:value-type="string">
            <text:p>Pokročilá témata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06:56:47.979Z</text:p>
          </table:table-cell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TODO aplikace</text:p>
          </table:table-cell>
          <table:table-cell office:value-type="float" office:value="810815105769" calcext:value-type="float">
            <text:p>810815105769</text:p>
          </table:table-cell>
          <table:table-cell office:value-type="string" calcext:value-type="string">
            <text:p>Pokročilá témata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6:41:21.852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Webová aplikace pro správu filmů</text:p>
          </table:table-cell>
          <table:table-cell office:value-type="float" office:value="810815105769" calcext:value-type="float">
            <text:p>810815105769</text:p>
          </table:table-cell>
          <table:table-cell office:value-type="string" calcext:value-type="string">
            <text:p>Pokročilá témata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17T06:56:32.009Z</text:p>
          </table:table-cell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Webová aplikace pro správu filmů</text:p>
          </table:table-cell>
          <table:table-cell office:value-type="float" office:value="810815105769" calcext:value-type="float">
            <text:p>810815105769</text:p>
          </table:table-cell>
          <table:table-cell office:value-type="string" calcext:value-type="string">
            <text:p>Pokročilá témata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6:43:03.969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State management - Pinia - Kvízová aplikace</text:p>
          </table:table-cell>
          <table:table-cell office:value-type="float" office:value="810815105769" calcext:value-type="float">
            <text:p>810815105769</text:p>
          </table:table-cell>
          <table:table-cell office:value-type="string" calcext:value-type="string">
            <text:p>Pokročilá témata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6:43:58.238Z</text:p>
          </table:table-cell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State management - Pinia - Kvízová aplikace</text:p>
          </table:table-cell>
          <table:table-cell office:value-type="float" office:value="810815105769" calcext:value-type="float">
            <text:p>810815105769</text:p>
          </table:table-cell>
          <table:table-cell office:value-type="string" calcext:value-type="string">
            <text:p>Pokročilá témata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6:43:36.959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Responsive web design certifikac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12T09:11:30.674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Responsive web design certifikac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6-01-16T08:08:52.262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Responsive web design certifikac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ETURNED</text:p>
          </table:table-cell>
          <table:table-cell office:value-type="string" calcext:value-type="string">
            <text:p>2025-10-17T06:35:50.781Z</text:p>
          </table:table-cell>
          <table:table-cell office:value-type="string" calcext:value-type="string">
            <text:p>2025-11-07T08:23:08.987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Responsive web design certifikac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7:43:31.137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Responsive web design certifikac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7:44:43.718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Responsive web design certifikac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7:44:38.305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Responsive web design certifikac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7:45:06.637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Responsive web design certifikac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03T07:44:29.661Z</text:p>
          </table:table-cell>
          <table:table-cell office:value-type="string" calcext:value-type="string">
            <text:p>2025-11-14T07:24:11.557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Responsive web design certifikac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7:44:06.592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Responsive web design certifikac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ETURNED</text:p>
          </table:table-cell>
          <table:table-cell office:value-type="string" calcext:value-type="string">
            <text:p>2025-10-03T13:24:30.714Z</text:p>
          </table:table-cell>
          <table:table-cell office:value-type="string" calcext:value-type="string">
            <text:p>2025-11-07T08:24:53.988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Responsive web design certifikac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03T07:45:23.380Z</text:p>
          </table:table-cell>
          <table:table-cell office:value-type="string" calcext:value-type="string">
            <text:p>2025-10-03T07:45:23.381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Responsive web design certifikac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7:43:36.044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Responsive web design certifikac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7:46:05.721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Responsive web design certifikac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ETURNED</text:p>
          </table:table-cell>
          <table:table-cell office:value-type="string" calcext:value-type="string">
            <text:p>2025-09-12T07:59:49.809Z</text:p>
          </table:table-cell>
          <table:table-cell office:value-type="string" calcext:value-type="string">
            <text:p>2025-11-07T08:24:53.499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Responsive web design certifikac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7:44:23.384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Responsive web design certifikac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7:45:16.878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Responsive web design certifikac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7:44:42.188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Responsive web design certifikac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6-01-16T08:38:19.970Z</text:p>
          </table:table-cell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Responsive web design certifikac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ETURNED</text:p>
          </table:table-cell>
          <table:table-cell office:value-type="string" calcext:value-type="string">
            <text:p>2025-09-12T07:31:18.758Z</text:p>
          </table:table-cell>
          <table:table-cell office:value-type="string" calcext:value-type="string">
            <text:p>2025-11-07T08:24:53.995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Responsive web design certifikac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10-03T07:44:12.445Z</text:p>
          </table:table-cell>
          <table:table-cell office:value-type="string" calcext:value-type="string">
            <text:p>2025-10-03T07:44:12.446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Responsive web design certifikace</text:p>
          </table:table-cell>
          <table:table-cell office:value-type="float" office:value="813359522806" calcext:value-type="float">
            <text:p>813359522806</text:p>
          </table:table-cell>
          <table:table-cell office:value-type="string" calcext:value-type="string">
            <text:p>HTML a CSS - Certifications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office:value-type="string" calcext:value-type="string">
            <text:p>2025-11-21T08:35:27.002Z</text:p>
          </table:table-cell>
          <table:table-cell office:value-type="string" calcext:value-type="string">
            <text:p>2025-11-21T08:35:27.003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the CSS Box Model by Building a Rothko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7:48:01.385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the CSS Box Model by Building a Rothko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7:48:34.577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the CSS Box Model by Building a Rothko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7:46:46.316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the CSS Box Model by Building a Rothko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7:46:35.631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the CSS Box Model by Building a Rothko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7:47:37.576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the CSS Box Model by Building a Rothko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14T08:32:30.221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the CSS Box Model by Building a Rothko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0-03T07:48:07.876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the CSS Box Model by Building a Rothko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7:47:46.199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the CSS Box Model by Building a Rothko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0-13T10:54:13.278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the CSS Box Model by Building a Rothko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office:value-type="string" calcext:value-type="string">
            <text:p>2025-12-05T10:20:15.491Z</text:p>
          </table:table-cell>
          <table:table-cell office:value-type="string" calcext:value-type="string">
            <text:p>2025-12-05T10:20:15.492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the CSS Box Model by Building a Rothko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7:49:50.708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the CSS Box Model by Building a Rothko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05T08:52:17.724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the CSS Box Model by Building a Rothko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7:49:01.662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the CSS Box Model by Building a Rothko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7:48:12.522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the CSS Box Model by Building a Rothko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office:value-type="string" calcext:value-type="string">
            <text:p>2026-02-13T08:06:34.946Z</text:p>
          </table:table-cell>
          <table:table-cell office:value-type="string" calcext:value-type="string">
            <text:p>2026-02-13T08:06:34.947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the CSS Box Model by Building a Rothko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7:48:20.856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the CSS Box Model by Building a Rothko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7:49:00.400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the CSS Box Model by Building a Rothko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the CSS Box Model by Building a Rothko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7:47:12.121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the CSS Box Model by Building a Rothko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office:value-type="string" calcext:value-type="string">
            <text:p>2025-10-03T07:48:26.747Z</text:p>
          </table:table-cell>
          <table:table-cell office:value-type="string" calcext:value-type="string">
            <text:p>2025-10-03T07:48:26.748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the CSS Box Model by Building a Rothko Painting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10-03T07:47:16.454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JavaScript Algorithms and Data Structures - certifikac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RECLAIMED_BY_STUDENT</text:p>
          </table:table-cell>
          <table:table-cell office:value-type="string" calcext:value-type="string">
            <text:p>2025-10-03T07:41:13.067Z</text:p>
          </table:table-cell>
          <table:table-cell office:value-type="string" calcext:value-type="string">
            <text:p>2026-01-16T08:08:12.302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JavaScript Algorithms and Data Structures - certifikac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0-03T07:42:39.405Z</text:p>
          </table:table-cell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JavaScript Algorithms and Data Structures - certifikace</text:p>
          </table:table-cell>
          <table:table-cell office:value-type="float" office:value="809375851500" calcext:value-type="float">
            <text:p>809375851500</text:p>
          </table:table-cell>
          <table:table-cell office:value-type="string" calcext:value-type="string">
            <text:p>JavaScript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09-26T09:13:41.185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CSS Colors by Building a Set of Colored Markers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26T06:59:22.459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CSS Colors by Building a Set of Colored Markers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26T06:58:42.985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CSS Colors by Building a Set of Colored Markers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26T06:57:32.447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CSS Colors by Building a Set of Colored Markers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26T06:57:14.277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CSS Colors by Building a Set of Colored Markers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TURNED</text:p>
          </table:table-cell>
          <table:table-cell office:value-type="string" calcext:value-type="string">
            <text:p>2025-09-26T07:24:38.332Z</text:p>
          </table:table-cell>
          <table:table-cell office:value-type="string" calcext:value-type="string">
            <text:p>2025-10-03T06:57:12.114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CSS Colors by Building a Set of Colored Markers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0-03T07:46:41.011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CSS Colors by Building a Set of Colored Markers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26T06:59:21.535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CSS Colors by Building a Set of Colored Markers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26T06:58:15.495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CSS Colors by Building a Set of Colored Markers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26T06:57:52.699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CSS Colors by Building a Set of Colored Markers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2-05T10:20:10.572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CSS Colors by Building a Set of Colored Markers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26T06:59:19.689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CSS Colors by Building a Set of Colored Markers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26T06:57:23.930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CSS Colors by Building a Set of Colored Markers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26T06:59:05.184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CSS Colors by Building a Set of Colored Markers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26T06:58:09.877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CSS Colors by Building a Set of Colored Markers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office:value-type="string" calcext:value-type="string">
            <text:p>2025-09-26T07:23:26.479Z</text:p>
          </table:table-cell>
          <table:table-cell office:value-type="string" calcext:value-type="string">
            <text:p>2025-12-12T08:34:08.246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CSS Colors by Building a Set of Colored Markers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26T06:58:55.676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CSS Colors by Building a Set of Colored Markers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26T06:59:16.594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CSS Colors by Building a Set of Colored Markers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CSS Colors by Building a Set of Colored Markers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09-26T06:57:41.312Z</text:p>
          </table:table-cell>
          <table:table-cell office:value-type="string" calcext:value-type="string">
            <text:p>2025-09-26T06:57:41.313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CSS Colors by Building a Set of Colored Markers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26T06:58:08.686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CSS Colors by Building a Set of Colored Markers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0-24T07:10:22.712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Basic CSS by Building a Cafe Menu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19T07:04:16.751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Basic CSS by Building a Cafe Menu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19T07:03:32.229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Basic CSS by Building a Cafe Menu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TURNED</text:p>
          </table:table-cell>
          <table:table-cell office:value-type="string" calcext:value-type="string">
            <text:p>2025-09-19T08:26:21.396Z</text:p>
          </table:table-cell>
          <table:table-cell office:value-type="string" calcext:value-type="string">
            <text:p>2025-09-26T06:40:59.681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Basic CSS by Building a Cafe Menu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0-03T11:01:38.445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Basic CSS by Building a Cafe Menu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TURNED</text:p>
          </table:table-cell>
          <table:table-cell office:value-type="string" calcext:value-type="string">
            <text:p>2025-09-26T06:07:27.521Z</text:p>
          </table:table-cell>
          <table:table-cell office:value-type="string" calcext:value-type="string">
            <text:p>2025-09-26T06:40:59.636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Basic CSS by Building a Cafe Menu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TURNED</text:p>
          </table:table-cell>
          <table:table-cell office:value-type="string" calcext:value-type="string">
            <text:p>2025-09-19T07:03:29.227Z</text:p>
          </table:table-cell>
          <table:table-cell office:value-type="string" calcext:value-type="string">
            <text:p>2025-09-26T06:40:59.641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Basic CSS by Building a Cafe Menu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TURNED</text:p>
          </table:table-cell>
          <table:table-cell office:value-type="string" calcext:value-type="string">
            <text:p>2025-09-26T07:40:37.944Z</text:p>
          </table:table-cell>
          <table:table-cell office:value-type="string" calcext:value-type="string">
            <text:p>2025-10-03T06:57:51.091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Basic CSS by Building a Cafe Menu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0-17T07:02:34.939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Basic CSS by Building a Cafe Menu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TURNED</text:p>
          </table:table-cell>
          <table:table-cell office:value-type="string" calcext:value-type="string">
            <text:p>2025-09-19T07:17:57.235Z</text:p>
          </table:table-cell>
          <table:table-cell office:value-type="string" calcext:value-type="string">
            <text:p>2025-09-26T06:40:02.599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Basic CSS by Building a Cafe Menu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TURNED</text:p>
          </table:table-cell>
          <table:table-cell office:value-type="string" calcext:value-type="string">
            <text:p>2025-09-20T20:16:48.222Z</text:p>
          </table:table-cell>
          <table:table-cell office:value-type="string" calcext:value-type="string">
            <text:p>2025-09-26T06:40:59.699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Basic CSS by Building a Cafe Menu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19T07:04:49.702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Basic CSS by Building a Cafe Menu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28T07:49:42.068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Basic CSS by Building a Cafe Menu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09-19T07:04:08.600Z</text:p>
          </table:table-cell>
          <table:table-cell office:value-type="string" calcext:value-type="string">
            <text:p>2025-09-19T07:04:08.601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Basic CSS by Building a Cafe Menu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19T07:03:45.994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Basic CSS by Building a Cafe Menu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1-13T11:21:47.558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Basic CSS by Building a Cafe Menu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09-19T07:02:37.142Z</text:p>
          </table:table-cell>
          <table:table-cell office:value-type="string" calcext:value-type="string">
            <text:p>2025-09-19T07:02:58.053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Basic CSS by Building a Cafe Menu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19T07:03:47.252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Basic CSS by Building a Cafe Menu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Basic CSS by Building a Cafe Menu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19T07:02:55.352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Basic CSS by Building a Cafe Menu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19T07:02:52.931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Basic CSS by Building a Cafe Menu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0-03T07:54:48.509Z</text:p>
          </table:table-cell>
        </table:table-row>
        <table:table-row table:style-name="ro1" table:visibility="filter">
          <table:table-cell office:value-type="string" calcext:value-type="string">
            <text:p>Adam Boura</text:p>
          </table:table-cell>
          <table:table-cell/>
          <table:table-cell office:value-type="string" calcext:value-type="string">
            <text:p>Learn HTML by Building a Cat Photo App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2025-09-05T07:13:47.786Z</text:p>
          </table:table-cell>
          <table:table-cell office:value-type="string" calcext:value-type="string">
            <text:p>2025-09-12T07:47:55.713Z</text:p>
          </table:table-cell>
        </table:table-row>
        <table:table-row table:style-name="ro1" table:visibility="filter">
          <table:table-cell office:value-type="string" calcext:value-type="string">
            <text:p>Christian Enc</text:p>
          </table:table-cell>
          <table:table-cell/>
          <table:table-cell office:value-type="string" calcext:value-type="string">
            <text:p>Learn HTML by Building a Cat Photo App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05T07:13:22.128Z</text:p>
          </table:table-cell>
        </table:table-row>
        <table:table-row table:style-name="ro1" table:visibility="filter">
          <table:table-cell office:value-type="string" calcext:value-type="string">
            <text:p>Hanuš Lipka</text:p>
          </table:table-cell>
          <table:table-cell/>
          <table:table-cell office:value-type="string" calcext:value-type="string">
            <text:p>Learn HTML by Building a Cat Photo App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TURNED</text:p>
          </table:table-cell>
          <table:table-cell office:value-type="string" calcext:value-type="string">
            <text:p>2025-09-12T07:14:45.302Z</text:p>
          </table:table-cell>
          <table:table-cell office:value-type="string" calcext:value-type="string">
            <text:p>2025-09-12T07:17:41.375Z</text:p>
          </table:table-cell>
        </table:table-row>
        <table:table-row table:style-name="ro1" table:visibility="filter">
          <table:table-cell office:value-type="string" calcext:value-type="string">
            <text:p>Lukáš Bejšovec</text:p>
          </table:table-cell>
          <table:table-cell/>
          <table:table-cell office:value-type="string" calcext:value-type="string">
            <text:p>Learn HTML by Building a Cat Photo App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TURNED</text:p>
          </table:table-cell>
          <table:table-cell office:value-type="string" calcext:value-type="string">
            <text:p>2025-09-19T07:14:28.581Z</text:p>
          </table:table-cell>
          <table:table-cell office:value-type="string" calcext:value-type="string">
            <text:p>2025-09-26T06:37:47.031Z</text:p>
          </table:table-cell>
        </table:table-row>
        <table:table-row table:style-name="ro1" table:visibility="filter">
          <table:table-cell office:value-type="string" calcext:value-type="string">
            <text:p>Alan Fridrich</text:p>
          </table:table-cell>
          <table:table-cell/>
          <table:table-cell office:value-type="string" calcext:value-type="string">
            <text:p>Learn HTML by Building a Cat Photo App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TURNED</text:p>
          </table:table-cell>
          <table:table-cell office:value-type="string" calcext:value-type="string">
            <text:p>2025-09-12T07:32:56.030Z</text:p>
          </table:table-cell>
          <table:table-cell office:value-type="string" calcext:value-type="string">
            <text:p>2025-09-26T06:38:31.078Z</text:p>
          </table:table-cell>
        </table:table-row>
        <table:table-row table:style-name="ro1" table:visibility="filter">
          <table:table-cell office:value-type="string" calcext:value-type="string">
            <text:p>Matyáš Píše</text:p>
          </table:table-cell>
          <table:table-cell/>
          <table:table-cell office:value-type="string" calcext:value-type="string">
            <text:p>Learn HTML by Building a Cat Photo App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TURNED</text:p>
          </table:table-cell>
          <table:table-cell office:value-type="string" calcext:value-type="string">
            <text:p>2025-09-12T07:10:22.359Z</text:p>
          </table:table-cell>
          <table:table-cell office:value-type="string" calcext:value-type="string">
            <text:p>2025-09-12T07:18:02.166Z</text:p>
          </table:table-cell>
        </table:table-row>
        <table:table-row table:style-name="ro1" table:visibility="filter">
          <table:table-cell office:value-type="string" calcext:value-type="string">
            <text:p>Barbora Julinková</text:p>
          </table:table-cell>
          <table:table-cell/>
          <table:table-cell office:value-type="string" calcext:value-type="string">
            <text:p>Learn HTML by Building a Cat Photo App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TURNED</text:p>
          </table:table-cell>
          <table:table-cell office:value-type="string" calcext:value-type="string">
            <text:p>2025-09-12T07:41:26.407Z</text:p>
          </table:table-cell>
          <table:table-cell office:value-type="string" calcext:value-type="string">
            <text:p>2025-09-26T06:38:51.090Z</text:p>
          </table:table-cell>
        </table:table-row>
        <table:table-row table:style-name="ro1" table:visibility="filter">
          <table:table-cell office:value-type="string" calcext:value-type="string">
            <text:p>Damien White</text:p>
          </table:table-cell>
          <table:table-cell/>
          <table:table-cell office:value-type="string" calcext:value-type="string">
            <text:p>Learn HTML by Building a Cat Photo App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TURNED</text:p>
          </table:table-cell>
          <table:table-cell office:value-type="string" calcext:value-type="string">
            <text:p>2025-09-26T07:00:59.189Z</text:p>
          </table:table-cell>
          <table:table-cell office:value-type="string" calcext:value-type="string">
            <text:p>2025-09-26T07:37:02.686Z</text:p>
          </table:table-cell>
        </table:table-row>
        <table:table-row table:style-name="ro1" table:visibility="filter">
          <table:table-cell office:value-type="string" calcext:value-type="string">
            <text:p>Marek Chvojka</text:p>
          </table:table-cell>
          <table:table-cell/>
          <table:table-cell office:value-type="string" calcext:value-type="string">
            <text:p>Learn HTML by Building a Cat Photo App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TURNED</text:p>
          </table:table-cell>
          <table:table-cell office:value-type="string" calcext:value-type="string">
            <text:p>2025-09-19T07:13:50.232Z</text:p>
          </table:table-cell>
          <table:table-cell office:value-type="string" calcext:value-type="string">
            <text:p>2025-09-26T06:38:19.382Z</text:p>
          </table:table-cell>
        </table:table-row>
        <table:table-row table:style-name="ro1" table:visibility="filter">
          <table:table-cell office:value-type="string" calcext:value-type="string">
            <text:p>Antonín Tejkl</text:p>
          </table:table-cell>
          <table:table-cell/>
          <table:table-cell office:value-type="string" calcext:value-type="string">
            <text:p>Learn HTML by Building a Cat Photo App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TURNED</text:p>
          </table:table-cell>
          <table:table-cell office:value-type="string" calcext:value-type="string">
            <text:p>2025-09-05T09:33:19.860Z</text:p>
          </table:table-cell>
          <table:table-cell office:value-type="string" calcext:value-type="string">
            <text:p>2025-09-12T06:38:05.608Z</text:p>
          </table:table-cell>
        </table:table-row>
        <table:table-row table:style-name="ro1" table:visibility="filter">
          <table:table-cell office:value-type="string" calcext:value-type="string">
            <text:p>Sofia Rebstöck</text:p>
          </table:table-cell>
          <table:table-cell/>
          <table:table-cell office:value-type="string" calcext:value-type="string">
            <text:p>Learn HTML by Building a Cat Photo App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0-03T07:22:10.489Z</text:p>
          </table:table-cell>
        </table:table-row>
        <table:table-row table:style-name="ro1" table:visibility="filter">
          <table:table-cell office:value-type="string" calcext:value-type="string">
            <text:p>Viktor Králík</text:p>
          </table:table-cell>
          <table:table-cell/>
          <table:table-cell office:value-type="string" calcext:value-type="string">
            <text:p>Learn HTML by Building a Cat Photo App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TURNED</text:p>
          </table:table-cell>
          <table:table-cell office:value-type="string" calcext:value-type="string">
            <text:p>2025-09-26T06:55:39.098Z</text:p>
          </table:table-cell>
          <table:table-cell office:value-type="string" calcext:value-type="string">
            <text:p>2025-09-26T07:38:11.032Z</text:p>
          </table:table-cell>
        </table:table-row>
        <table:table-row table:style-name="ro1" table:visibility="filter">
          <table:table-cell office:value-type="string" calcext:value-type="string">
            <text:p>Esther Prokopová</text:p>
          </table:table-cell>
          <table:table-cell/>
          <table:table-cell office:value-type="string" calcext:value-type="string">
            <text:p>Learn HTML by Building a Cat Photo App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table:number-columns-repeated="2" office:value-type="string" calcext:value-type="string">
            <text:p>2025-10-17T07:23:53.717Z</text:p>
          </table:table-cell>
        </table:table-row>
        <table:table-row table:style-name="ro1" table:visibility="filter">
          <table:table-cell office:value-type="string" calcext:value-type="string">
            <text:p>Mathias Enc</text:p>
          </table:table-cell>
          <table:table-cell/>
          <table:table-cell office:value-type="string" calcext:value-type="string">
            <text:p>Learn HTML by Building a Cat Photo App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05T07:13:28.958Z</text:p>
          </table:table-cell>
        </table:table-row>
        <table:table-row table:style-name="ro1" table:visibility="filter">
          <table:table-cell office:value-type="string" calcext:value-type="string">
            <text:p>Anna Foltýnová</text:p>
          </table:table-cell>
          <table:table-cell/>
          <table:table-cell office:value-type="string" calcext:value-type="string">
            <text:p>Learn HTML by Building a Cat Photo App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TURNED</text:p>
          </table:table-cell>
          <table:table-cell office:value-type="string" calcext:value-type="string">
            <text:p>2025-09-26T07:24:10.995Z</text:p>
          </table:table-cell>
          <table:table-cell office:value-type="string" calcext:value-type="string">
            <text:p>2025-09-26T07:38:54.995Z</text:p>
          </table:table-cell>
        </table:table-row>
        <table:table-row table:style-name="ro1" table:visibility="filter">
          <table:table-cell office:value-type="string" calcext:value-type="string">
            <text:p>Aleš Vojáček</text:p>
          </table:table-cell>
          <table:table-cell/>
          <table:table-cell office:value-type="string" calcext:value-type="string">
            <text:p>Learn HTML by Building a Cat Photo App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TURNED</text:p>
          </table:table-cell>
          <table:table-cell office:value-type="string" calcext:value-type="string">
            <text:p>2025-09-12T06:37:41.960Z</text:p>
          </table:table-cell>
          <table:table-cell office:value-type="string" calcext:value-type="string">
            <text:p>2025-09-12T06:38:59.525Z</text:p>
          </table:table-cell>
        </table:table-row>
        <table:table-row table:style-name="ro1" table:visibility="filter">
          <table:table-cell office:value-type="string" calcext:value-type="string">
            <text:p>Sabina Víchová</text:p>
          </table:table-cell>
          <table:table-cell/>
          <table:table-cell office:value-type="string" calcext:value-type="string">
            <text:p>Learn HTML by Building a Cat Photo App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URNED_IN</text:p>
          </table:table-cell>
          <table:table-cell office:value-type="string" calcext:value-type="string">
            <text:p>2025-10-03T07:21:24.075Z</text:p>
          </table:table-cell>
          <table:table-cell office:value-type="string" calcext:value-type="string">
            <text:p>2025-10-03T07:22:20.654Z</text:p>
          </table:table-cell>
        </table:table-row>
        <table:table-row table:style-name="ro1" table:visibility="filter">
          <table:table-cell office:value-type="string" calcext:value-type="string">
            <text:p>Karolína Pečenková</text:p>
          </table:table-cell>
          <table:table-cell/>
          <table:table-cell office:value-type="string" calcext:value-type="string">
            <text:p>Learn HTML by Building a Cat Photo App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yštof Linhart</text:p>
          </table:table-cell>
          <table:table-cell/>
          <table:table-cell office:value-type="string" calcext:value-type="string">
            <text:p>Learn HTML by Building a Cat Photo App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table:number-columns-repeated="2" office:value-type="string" calcext:value-type="string">
            <text:p>2025-09-05T07:12:48.154Z</text:p>
          </table:table-cell>
        </table:table-row>
        <table:table-row table:style-name="ro1" table:visibility="filter">
          <table:table-cell office:value-type="string" calcext:value-type="string">
            <text:p>Jakub Hulín</text:p>
          </table:table-cell>
          <table:table-cell/>
          <table:table-cell office:value-type="string" calcext:value-type="string">
            <text:p>Learn HTML by Building a Cat Photo App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TURNED</text:p>
          </table:table-cell>
          <table:table-cell office:value-type="string" calcext:value-type="string">
            <text:p>2025-09-19T07:04:06.736Z</text:p>
          </table:table-cell>
          <table:table-cell office:value-type="string" calcext:value-type="string">
            <text:p>2025-09-26T06:38:39.481Z</text:p>
          </table:table-cell>
        </table:table-row>
        <table:table-row table:style-name="ro1" table:visibility="filter">
          <table:table-cell office:value-type="string" calcext:value-type="string">
            <text:p>Veronika Vargová</text:p>
          </table:table-cell>
          <table:table-cell/>
          <table:table-cell office:value-type="string" calcext:value-type="string">
            <text:p>Learn HTML by Building a Cat Photo App</text:p>
          </table:table-cell>
          <table:table-cell office:value-type="float" office:value="780427172364" calcext:value-type="float">
            <text:p>780427172364</text:p>
          </table:table-cell>
          <table:table-cell office:value-type="string" calcext:value-type="string">
            <text:p>HTML a CSS - Learning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TURNED</text:p>
          </table:table-cell>
          <table:table-cell office:value-type="string" calcext:value-type="string">
            <text:p>2025-09-19T06:54:54.832Z</text:p>
          </table:table-cell>
          <table:table-cell office:value-type="string" calcext:value-type="string">
            <text:p>2025-09-26T06:39:03.259Z</text:p>
          </table:table-cell>
        </table:table-row>
      </table:table>
      <table:named-expressions/>
      <table:database-ranges>
        <table:database-range table:name="__Anonymous_Sheet_DB__0" table:target-range-address="seznam_uloh_JS.A1:seznam_uloh_JS.L1003" table:display-filter-buttons="true">
          <table:filter>
            <table:filter-and>
              <table:filter-condition table:value="JavaScript – Certifications" table:operator="=" table:field-number="4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20T08:30:53.023211559</dc:date>
    <meta:editing-duration>PT2M35S</meta:editing-duration>
    <meta:editing-cycles>1</meta:editing-cycles>
    <meta:document-statistic meta:table-count="1" meta:cell-count="8427" meta:object-count="0"/>
    <meta:generator>LibreOffice/25.8.4.2$Linux_X86_64 LibreOffice_project/580$Build-2</meta:generator>
  </office:meta>
</office:document-meta>
</file>