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1. IT Gymnáz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Tota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rie počítačů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tomie počítač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rační systém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ux - Začarovaný 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x - Podzemí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rn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P adres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tování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ux intr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áce se soubory - základ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áce se soubory - test základ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tivní a absolutní cesty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ativní a absolutní cesty - tes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áce se soubory - pokročil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xtové editory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xtové editory - tes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rávnění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rávnění - tes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živatelé - základy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ux základy - závěrečný t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živatelé - úprav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živatelé - skupiny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živatelé - test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'1. IT Gymnázium'.A2:'1. IT Gymnázium'.C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19T12:26:13.564956967</dc:date>
    <meta:editing-duration>PT11S</meta:editing-duration>
    <meta:editing-cycles>1</meta:editing-cycles>
    <meta:document-statistic meta:table-count="1" meta:cell-count="75" meta:object-count="0"/>
  </office:meta>
</office:document-meta>
</file>